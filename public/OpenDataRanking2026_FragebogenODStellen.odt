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1001" style:master-page-name="MasterPage2" style:family="paragraph" style:name="P49">
      <style:paragraph-properties fo:text-align="center"/>
      <style:text-properties fo:color="#4338ca" fo:font-family="HK Grotesk" style:font-family-asian="HK Grotesk" style:font-family-complex="HK Grotesk" fo:font-size="18pt" style:font-size-complex="18pt" fo:language="de" fo:country="DE" fo:font-weight="bold"/>
    </style:style>
    <style:style style:family="text" style:name="T320">
      <style:text-properties/>
    </style:style>
    <style:style style:family="text" style:name="T321">
      <style:text-properties/>
    </style:style>
    <style:style style:family="text" style:name="T322">
      <style:text-properties/>
    </style:style>
    <style:style style:family="text" style:name="T323">
      <style:text-properties/>
    </style:style>
    <style:style style:parent-style-name="1001" style:family="paragraph" style:name="P59">
      <style:paragraph-properties fo:text-align="center"/>
      <style:text-properties fo:color="#4338ca" fo:font-family="HK Grotesk" style:font-family-asian="HK Grotesk" style:font-family-complex="HK Grotesk" fo:font-size="18pt" style:font-size-complex="18pt" fo:language="de" fo:country="DE" fo:font-weight="bold"/>
    </style:style>
    <style:style style:family="text" style:name="T324">
      <style:text-properties/>
    </style:style>
    <style:style style:family="text" style:name="T325">
      <style:text-properties/>
    </style:style>
    <style:style style:family="text" style:name="T326">
      <style:text-properties/>
    </style:style>
    <style:style style:family="paragraph" style:name="P60">
      <style:paragraph-properties/>
      <style:text-properties/>
    </style:style>
    <style:style style:family="text" style:name="T327">
      <style:text-properties/>
    </style:style>
    <style:style style:family="text" style:name="T328">
      <style:text-properties/>
    </style:style>
    <style:style style:family="text" style:name="T329">
      <style:text-properties/>
    </style:style>
    <style:style style:family="paragraph" style:name="P61">
      <style:paragraph-properties/>
      <style:text-properties/>
    </style:style>
    <style:style style:family="text" style:name="T330">
      <style:text-properties/>
    </style:style>
    <style:style style:family="text" style:name="T331">
      <style:text-properties/>
    </style:style>
    <style:style style:family="paragraph" style:name="P62">
      <style:paragraph-properties/>
      <style:text-properties/>
    </style:style>
    <style:style style:family="text" style:name="T332">
      <style:text-properties/>
    </style:style>
    <style:style style:family="text" style:name="T333">
      <style:text-properties/>
    </style:style>
    <style:style style:family="paragraph" style:name="P63">
      <style:paragraph-properties/>
      <style:text-properties/>
    </style:style>
    <style:style style:family="text" style:name="T334">
      <style:text-properties/>
    </style:style>
    <style:style style:family="text" style:name="T335">
      <style:text-properties/>
    </style:style>
    <style:style style:parent-style-name="1029" style:family="text" style:name="T336">
      <style:text-properties/>
    </style:style>
    <style:style style:family="text" style:name="T337">
      <style:text-properties/>
    </style:style>
    <style:style style:family="text" style:name="T338">
      <style:text-properties/>
    </style:style>
    <style:style style:family="paragraph" style:name="P64">
      <style:paragraph-properties/>
      <style:text-properties/>
    </style:style>
    <style:style style:family="text" style:name="T339">
      <style:text-properties/>
    </style:style>
    <style:style style:family="text" style:name="T340">
      <style:text-properties/>
    </style:style>
    <style:style style:family="paragraph" style:name="P65">
      <style:paragraph-properties/>
      <style:text-properties/>
    </style:style>
    <style:style style:family="text" style:name="T341">
      <style:text-properties/>
    </style:style>
    <style:style style:family="text" style:name="T342">
      <style:text-properties/>
    </style:style>
    <style:style style:family="paragraph" style:name="P66">
      <style:paragraph-properties/>
      <style:text-properties/>
    </style:style>
    <style:style style:family="text" style:name="T343">
      <style:text-properties/>
    </style:style>
    <style:style style:family="text" style:name="T344">
      <style:text-properties/>
    </style:style>
    <style:style style:family="paragraph" style:name="P67">
      <style:paragraph-properties/>
      <style:text-properties/>
    </style:style>
    <style:style style:family="text" style:name="T345">
      <style:text-properties/>
    </style:style>
    <style:style style:family="text" style:name="T346">
      <style:text-properties/>
    </style:style>
    <style:style style:family="paragraph" style:name="P68">
      <style:paragraph-properties/>
      <style:text-properties/>
    </style:style>
    <style:style style:family="text" style:name="T347">
      <style:text-properties/>
    </style:style>
    <style:style style:family="text" style:name="T348">
      <style:text-properties/>
    </style:style>
    <style:style style:family="paragraph" style:name="P69">
      <style:paragraph-properties/>
      <style:text-properties/>
    </style:style>
    <style:style style:family="text" style:name="T349">
      <style:text-properties/>
    </style:style>
    <style:style style:parent-style-name="1029" style:family="text" style:name="T350">
      <style:text-properties/>
    </style:style>
    <style:style style:family="text" style:name="T351">
      <style:text-properties/>
    </style:style>
    <style:style style:family="text" style:name="T352">
      <style:text-properties/>
    </style:style>
    <style:style style:family="paragraph" style:name="P70">
      <style:paragraph-properties/>
      <style:text-properties/>
    </style:style>
    <style:style style:family="text" style:name="T353">
      <style:text-properties/>
    </style:style>
    <style:style style:family="text" style:name="T354">
      <style:text-properties/>
    </style:style>
    <style:style style:parent-style-name="1007" style:list-style-name="WWNum31" style:family="paragraph" style:name="P71">
      <style:paragraph-properties/>
      <style:text-properties fo:font-family="HK Grotesk" style:font-family-asian="HK Grotesk" style:font-family-complex="HK Grotesk" fo:font-size="10pt" fo:language="de" fo:country="DE"/>
    </style:style>
    <style:style style:family="text" style:name="T355">
      <style:text-properties/>
    </style:style>
    <style:style style:family="text" style:name="T356">
      <style:text-properties/>
    </style:style>
    <style:style style:parent-style-name="1007" style:list-style-name="WWNum31" style:family="paragraph" style:name="P72">
      <style:paragraph-properties/>
      <style:text-properties fo:font-family="HK Grotesk" style:font-family-asian="HK Grotesk" style:font-family-complex="HK Grotesk" fo:font-size="10pt" fo:language="de" fo:country="DE"/>
    </style:style>
    <style:style style:family="text" style:name="T357">
      <style:text-properties/>
    </style:style>
    <style:style style:family="text" style:name="T358">
      <style:text-properties/>
    </style:style>
    <style:style style:parent-style-name="1007" style:list-style-name="WWNum31" style:family="paragraph" style:name="P73">
      <style:paragraph-properties/>
      <style:text-properties fo:font-family="HK Grotesk" style:font-family-asian="HK Grotesk" style:font-family-complex="HK Grotesk" fo:font-size="10pt" fo:language="de" fo:country="DE"/>
    </style:style>
    <style:style style:family="text" style:name="T359">
      <style:text-properties/>
    </style:style>
    <style:style style:family="text" style:name="T360">
      <style:text-properties/>
    </style:style>
    <style:style style:family="paragraph" style:name="P74">
      <style:paragraph-properties/>
      <style:text-properties/>
    </style:style>
    <style:style style:family="text" style:name="T361">
      <style:text-properties/>
    </style:style>
    <style:style style:family="text" style:name="T362">
      <style:text-properties/>
    </style:style>
    <style:style style:family="paragraph" style:name="P75">
      <style:paragraph-properties/>
      <style:text-properties/>
    </style:style>
    <style:style style:family="text" style:name="T363">
      <style:text-properties/>
    </style:style>
    <style:style style:parent-style-name="1029" style:family="text" style:name="T364">
      <style:text-properties/>
    </style:style>
    <style:style style:family="text" style:name="T365">
      <style:text-properties/>
    </style:style>
    <style:style style:family="text" style:name="T366">
      <style:text-properties/>
    </style:style>
    <style:style style:family="paragraph" style:name="P76">
      <style:paragraph-properties/>
      <style:text-properties/>
    </style:style>
    <style:style style:family="text" style:name="T367">
      <style:text-properties/>
    </style:style>
    <style:style style:family="text" style:name="T368">
      <style:text-properties/>
    </style:style>
    <style:style style:family="paragraph" style:name="P77">
      <style:paragraph-properties/>
      <style:text-properties/>
    </style:style>
    <style:style style:family="text" style:name="T369">
      <style:text-properties/>
    </style:style>
    <style:style style:family="text" style:name="T370">
      <style:text-properties/>
    </style:style>
    <style:style style:family="paragraph" style:name="P78">
      <style:paragraph-properties/>
      <style:text-properties/>
    </style:style>
    <style:style style:family="text" style:name="T371">
      <style:text-properties/>
    </style:style>
    <style:style style:family="text" style:name="T372">
      <style:text-properties/>
    </style:style>
    <style:style style:family="paragraph" style:name="P79">
      <style:paragraph-properties/>
      <style:text-properties/>
    </style:style>
    <style:style style:family="text" style:name="T373">
      <style:text-properties/>
    </style:style>
    <style:style style:family="text" style:name="T374">
      <style:text-properties/>
    </style:style>
    <style:style style:parent-style-name="1029" style:family="text" style:name="T375">
      <style:text-properties/>
    </style:style>
    <style:style style:parent-style-name="1029" style:family="text" style:name="T376">
      <style:text-properties/>
    </style:style>
    <style:style style:family="text" style:name="T377">
      <style:text-properties/>
    </style:style>
    <style:style style:family="text" style:name="T378">
      <style:text-properties/>
    </style:style>
    <style:style style:family="paragraph" style:name="P80">
      <style:paragraph-properties/>
      <style:text-properties/>
    </style:style>
    <style:style style:family="text" style:name="T379">
      <style:text-properties/>
    </style:style>
    <style:style style:family="text" style:name="T380">
      <style:text-properties/>
    </style:style>
    <style:style style:family="paragraph" style:name="P81">
      <style:paragraph-properties/>
      <style:text-properties/>
    </style:style>
    <style:style style:family="text" style:name="T381">
      <style:text-properties/>
    </style:style>
    <style:style style:family="text" style:name="T382">
      <style:text-properties/>
    </style:style>
    <style:style style:family="paragraph" style:name="P82">
      <style:paragraph-properties/>
      <style:text-properties/>
    </style:style>
    <style:style style:family="text" style:name="T383">
      <style:text-properties/>
    </style:style>
    <style:style style:family="text" style:name="T384">
      <style:text-properties/>
    </style:style>
    <style:style style:family="paragraph" style:name="P83">
      <style:paragraph-properties/>
      <style:text-properties/>
    </style:style>
    <style:style style:family="text" style:name="T385">
      <style:text-properties/>
    </style:style>
    <style:style style:family="text" style:name="T386">
      <style:text-properties/>
    </style:style>
    <style:style style:family="paragraph" style:name="P84">
      <style:paragraph-properties/>
      <style:text-properties/>
    </style:style>
    <style:style style:family="text" style:name="T387">
      <style:text-properties/>
    </style:style>
    <style:style style:parent-style-name="1029" style:family="text" style:name="T388">
      <style:text-properties/>
    </style:style>
    <style:style style:family="text" style:name="T389">
      <style:text-properties/>
    </style:style>
    <style:style style:parent-style-name="1029" style:family="text" style:name="T390">
      <style:text-properties/>
    </style:style>
    <style:style style:family="text" style:name="T391">
      <style:text-properties/>
    </style:style>
    <style:style style:parent-style-name="1001" style:family="paragraph" style:name="P85">
      <style:paragraph-properties fo:text-align="center"/>
      <style:text-properties fo:color="#4338ca" fo:font-family="HK Grotesk" style:font-family-asian="HK Grotesk" style:font-family-complex="HK Grotesk" fo:font-size="18pt" style:font-size-complex="18pt" fo:language="de" fo:country="DE" fo:font-weight="bold"/>
    </style:style>
    <style:style style:family="text" style:name="T392">
      <style:text-properties/>
    </style:style>
    <style:style style:family="text" style:name="T393">
      <style:text-properties/>
    </style:style>
    <style:style style:family="text" style:name="T394">
      <style:text-properties/>
    </style:style>
    <style:style style:parent-style-name="1001" style:family="paragraph" style:name="P86">
      <style:paragraph-properties fo:text-align="center"/>
      <style:text-properties fo:color="#4338ca" fo:font-family="HK Grotesk" style:font-family-asian="HK Grotesk" style:font-family-complex="HK Grotesk" fo:font-size="18pt" style:font-size-complex="18pt" fo:language="de" fo:country="DE" fo:font-weight="bold"/>
    </style:style>
    <style:style style:family="text" style:name="T395">
      <style:text-properties/>
    </style:style>
    <style:style style:family="text" style:name="T396">
      <style:text-properties/>
    </style:style>
    <style:style style:family="text" style:name="T397">
      <style:text-properties/>
    </style:style>
    <style:style style:parent-style-name="1001" style:family="paragraph" style:name="P87">
      <style:paragraph-properties fo:text-align="center"/>
      <style:text-properties fo:color="#4338ca" fo:font-family="HK Grotesk" style:font-family-asian="HK Grotesk" style:font-family-complex="HK Grotesk" fo:font-size="18pt" style:font-size-complex="18pt" fo:language="de" fo:country="DE" fo:font-weight="bold"/>
    </style:style>
    <style:style style:family="text" style:name="T398">
      <style:text-properties/>
    </style:style>
    <style:style style:family="text" style:name="T399">
      <style:text-properties/>
    </style:style>
    <style:style style:family="text" style:name="T400">
      <style:text-properties/>
    </style:style>
    <style:style style:parent-style-name="1001" style:family="paragraph" style:name="P88">
      <style:paragraph-properties fo:text-align="center"/>
      <style:text-properties fo:color="#4338ca" fo:font-family="HK Grotesk" style:font-family-asian="HK Grotesk" style:font-family-complex="HK Grotesk" fo:font-size="18pt" style:font-size-complex="18pt" fo:language="de" fo:country="DE" fo:font-weight="bold"/>
    </style:style>
    <style:style style:family="text" style:name="T401">
      <style:text-properties/>
    </style:style>
    <style:style style:family="text" style:name="T402">
      <style:text-properties/>
    </style:style>
    <style:style style:family="text" style:name="T403">
      <style:text-properties/>
    </style:style>
    <style:style style:parent-style-name="1001" style:family="paragraph" style:name="P89">
      <style:paragraph-properties fo:text-align="left"/>
      <style:text-properties fo:color="#4338ca" fo:font-family="HK Grotesk" style:font-family-asian="HK Grotesk" style:font-family-complex="HK Grotesk" fo:font-size="18pt" style:font-size-complex="18pt" fo:language="de" fo:country="DE" fo:font-weight="bold"/>
    </style:style>
    <style:style style:family="text" style:name="T404">
      <style:text-properties/>
    </style:style>
    <style:style style:family="text" style:name="T405">
      <style:text-properties/>
    </style:style>
    <style:style style:family="text" style:name="T406">
      <style:text-properties/>
    </style:style>
    <style:style style:parent-style-name="1001" style:family="paragraph" style:name="P90">
      <style:paragraph-properties fo:text-align="center"/>
      <style:text-properties fo:color="#4338ca" fo:font-family="HK Grotesk" style:font-family-asian="HK Grotesk" style:font-family-complex="HK Grotesk" fo:font-size="18pt" style:font-size-complex="18pt" fo:language="de" fo:country="DE" fo:font-weight="bold"/>
    </style:style>
    <style:style style:family="text" style:name="T407">
      <style:text-properties/>
    </style:style>
    <style:style style:family="text" style:name="T408">
      <style:text-properties/>
    </style:style>
    <style:style style:family="text" style:name="T409">
      <style:text-properties/>
    </style:style>
    <style:style style:parent-style-name="984" style:family="paragraph" style:name="P91">
      <style:paragraph-properties/>
      <style:text-properties fo:color="#4338ca" style:text-line-through-type="none" fo:font-family="HK Grotesk" style:font-family-asian="HK Grotesk" style:font-family-complex="HK Grotesk" fo:font-size="12pt" style:font-size-complex="12pt" fo:language="de" fo:country="DE" fo:font-style="normal" style:text-underline-type="single" style:text-underline-style="solid" style:text-underline-width="auto" style:text-underline-color="font-color" fo:font-weight="bold"/>
    </style:style>
    <style:style style:family="text" style:name="T410">
      <style:text-properties style:text-line-through-type="none" fo:font-style="normal" style:text-underline-type="single" style:text-underline-style="solid" style:text-underline-width="auto" style:text-underline-color="font-color" fo:font-weight="bold"/>
    </style:style>
    <style:style style:family="text" style:name="T411">
      <style:text-properties style:text-line-through-type="none" fo:font-style="normal" style:text-underline-type="single" style:text-underline-style="solid" style:text-underline-width="auto" style:text-underline-color="font-color" fo:font-weight="bold"/>
    </style:style>
    <style:style style:family="text" style:name="T412">
      <style:text-properties style:text-line-through-type="none" fo:font-style="normal" style:text-underline-type="single" style:text-underline-style="solid" style:text-underline-width="auto" style:text-underline-color="font-color" fo:font-weight="bold"/>
    </style:style>
    <style:style style:family="paragraph" style:name="P92">
      <style:paragraph-properties fo:margin-left="1.251cm" fo:text-indent="0cm"/>
      <style:text-properties fo:font-weight="bold"/>
    </style:style>
    <style:style style:family="text" style:name="T413">
      <style:text-properties fo:font-weight="bold"/>
    </style:style>
    <style:style style:family="text" style:name="T414">
      <style:text-properties fo:font-weight="bold"/>
    </style:style>
    <style:style style:family="text" style:name="T415">
      <style:text-properties fo:font-weight="bold"/>
    </style:style>
    <style:style style:parent-style-name="1007" style:list-style-name="WWNum3" style:family="paragraph" style:name="P93">
      <style:paragraph-properties/>
      <style:text-properties fo:font-family="HK Grotesk" style:font-family-asian="HK Grotesk" style:font-family-complex="HK Grotesk" fo:font-size="10pt" fo:language="de" fo:country="DE" fo:font-weight="bold"/>
    </style:style>
    <style:style style:family="text" style:name="T416">
      <style:text-properties fo:font-weight="bold"/>
    </style:style>
    <style:style style:family="text" style:name="T417">
      <style:text-properties fo:font-weight="bold"/>
    </style:style>
    <style:style style:family="text" style:name="T418">
      <style:text-properties fo:font-weight="bold"/>
    </style:style>
    <style:style style:family="text" style:name="T419">
      <style:text-properties fo:font-weight="bold"/>
    </style:style>
    <style:style style:family="paragraph" style:name="P94">
      <style:paragraph-properties fo:margin-left="1.251cm" fo:text-indent="0cm"/>
      <style:text-properties fo:font-style="italic"/>
    </style:style>
    <style:style style:family="text" style:name="T420">
      <style:text-properties fo:font-style="italic"/>
    </style:style>
    <style:style style:family="text" style:name="T421">
      <style:text-properties fo:font-style="italic"/>
    </style:style>
    <style:style style:parent-style-name="1029" style:family="text" style:name="T422">
      <style:text-properties fo:font-style="italic"/>
    </style:style>
    <style:style style:family="text" style:name="T423">
      <style:text-properties fo:font-style="italic"/>
    </style:style>
    <style:style style:family="text" style:name="T424">
      <style:text-properties fo:font-style="italic"/>
    </style:style>
    <style:style style:family="text" style:name="T425">
      <style:text-properties fo:font-style="italic"/>
    </style:style>
    <style:style style:family="paragraph" style:name="P95">
      <style:paragraph-properties fo:margin-left="0cm" fo:text-indent="0cm"/>
      <style:text-properties fo:font-style="italic"/>
    </style:style>
    <style:style style:family="text" style:name="T426">
      <style:text-properties fo:font-style="italic"/>
    </style:style>
    <style:style style:family="text" style:name="T427">
      <style:text-properties fo:font-style="italic"/>
    </style:style>
    <style:style style:family="text" style:name="T428">
      <style:text-properties fo:font-style="italic"/>
    </style:style>
    <style:style style:family="text" style:name="T429">
      <style:text-properties fo:font-style="italic"/>
    </style:style>
    <style:style style:family="paragraph" style:name="P96">
      <style:paragraph-properties fo:margin-left="0cm" fo:text-indent="0cm"/>
      <style:text-properties fo:font-style="italic"/>
    </style:style>
    <style:style style:family="text" style:name="T430">
      <style:text-properties fo:font-style="italic"/>
    </style:style>
    <style:style style:family="text" style:name="T431">
      <style:text-properties fo:font-style="italic"/>
    </style:style>
    <style:style style:family="text" style:name="T432">
      <style:text-properties fo:font-style="italic"/>
    </style:style>
    <style:style style:family="paragraph" style:name="P97">
      <style:paragraph-properties fo:margin-left="1.251cm" fo:text-indent="0cm"/>
      <style:text-properties fo:font-style="normal" fo:font-weight="bold"/>
    </style:style>
    <style:style style:family="text" style:name="T433">
      <style:text-properties fo:font-style="normal" fo:font-weight="bold"/>
    </style:style>
    <style:style style:family="text" style:name="T434">
      <style:text-properties fo:font-style="normal" fo:font-weight="bold"/>
    </style:style>
    <style:style style:family="text" style:name="T435">
      <style:text-properties fo:font-style="normal" fo:font-weight="bold"/>
    </style:style>
    <style:style style:family="paragraph" style:name="P98">
      <style:paragraph-properties fo:margin-left="1.251cm" fo:text-indent="0cm"/>
      <style:text-properties fo:font-style="normal" fo:font-weight="bold"/>
    </style:style>
    <style:style style:family="text" style:name="T436">
      <style:text-properties fo:font-style="normal" fo:font-weight="bold"/>
    </style:style>
    <style:style style:family="text" style:name="T437">
      <style:text-properties fo:font-style="normal" fo:font-weight="bold"/>
    </style:style>
    <style:style style:family="text" style:name="T438">
      <style:text-properties fo:font-style="normal" fo:font-weight="bold"/>
    </style:style>
    <style:style style:family="text" style:name="T439">
      <style:text-properties fo:font-style="normal" fo:font-weight="bold"/>
    </style:style>
    <style:style style:family="paragraph" style:name="P99">
      <style:paragraph-properties fo:margin-left="1.251cm" fo:text-indent="0cm"/>
      <style:text-properties fo:font-style="italic"/>
    </style:style>
    <style:style style:family="text" style:name="T440">
      <style:text-properties fo:font-style="italic"/>
    </style:style>
    <style:style style:family="text" style:name="T441">
      <style:text-properties fo:font-style="italic"/>
    </style:style>
    <style:style style:family="text" style:name="T442">
      <style:text-properties fo:font-style="italic"/>
    </style:style>
    <style:style style:family="text" style:name="T443">
      <style:text-properties fo:font-style="italic"/>
    </style:style>
    <style:style style:family="paragraph" style:name="P100">
      <style:paragraph-properties fo:margin-left="0cm" fo:text-indent="0cm"/>
      <style:text-properties fo:font-style="italic"/>
    </style:style>
    <style:style style:family="text" style:name="T444">
      <style:text-properties fo:font-style="italic"/>
    </style:style>
    <style:style style:family="text" style:name="T445">
      <style:text-properties fo:font-style="italic"/>
    </style:style>
    <style:style style:family="text" style:name="T446">
      <style:text-properties fo:font-style="italic"/>
    </style:style>
    <style:style style:family="text" style:name="T447">
      <style:text-properties fo:font-style="italic"/>
    </style:style>
    <style:style style:family="paragraph" style:name="P101">
      <style:paragraph-properties fo:margin-left="0cm" fo:text-indent="0cm"/>
      <style:text-properties fo:font-style="italic"/>
    </style:style>
    <style:style style:family="text" style:name="T448">
      <style:text-properties fo:font-style="italic"/>
    </style:style>
    <style:style style:family="text" style:name="T449">
      <style:text-properties fo:font-style="italic"/>
    </style:style>
    <style:style style:family="text" style:name="T450">
      <style:text-properties fo:font-style="italic"/>
    </style:style>
    <style:style style:family="paragraph" style:name="P102">
      <style:paragraph-properties fo:margin-left="0cm" fo:text-indent="0cm"/>
      <style:text-properties fo:font-style="italic"/>
    </style:style>
    <style:style style:family="text" style:name="T451">
      <style:text-properties fo:font-style="italic"/>
    </style:style>
    <style:style style:family="text" style:name="T452">
      <style:text-properties fo:font-style="italic"/>
    </style:style>
    <style:style style:family="text" style:name="T453">
      <style:text-properties fo:font-style="italic"/>
    </style:style>
    <style:style style:family="paragraph" style:name="P103">
      <style:paragraph-properties fo:margin-left="1.251cm" fo:text-indent="0cm"/>
      <style:text-properties fo:font-style="normal" fo:font-weight="bold"/>
    </style:style>
    <style:style style:family="text" style:name="T454">
      <style:text-properties fo:font-style="normal" fo:font-weight="bold"/>
    </style:style>
    <style:style style:family="text" style:name="T455">
      <style:text-properties fo:font-style="normal" fo:font-weight="bold"/>
    </style:style>
    <style:style style:family="text" style:name="T456">
      <style:text-properties fo:font-style="normal" fo:font-weight="bold"/>
    </style:style>
    <style:style style:family="text" style:name="T457">
      <style:text-properties fo:font-style="normal" fo:font-weight="bold"/>
    </style:style>
    <style:style style:family="paragraph" style:name="P104">
      <style:paragraph-properties fo:margin-left="0cm" fo:text-indent="0cm"/>
      <style:text-properties fo:font-style="italic"/>
    </style:style>
    <style:style style:family="text" style:name="T458">
      <style:text-properties fo:font-style="italic"/>
    </style:style>
    <style:style style:family="text" style:name="T459">
      <style:text-properties fo:font-style="italic"/>
    </style:style>
    <style:style style:family="text" style:name="T460">
      <style:text-properties fo:font-style="italic"/>
    </style:style>
    <style:style style:family="text" style:name="T461">
      <style:text-properties fo:font-style="italic"/>
    </style:style>
    <style:style style:family="paragraph" style:name="P105">
      <style:paragraph-properties fo:margin-left="0cm" fo:text-indent="0cm"/>
      <style:text-properties fo:font-style="italic"/>
    </style:style>
    <style:style style:family="text" style:name="T462">
      <style:text-properties fo:font-style="italic"/>
    </style:style>
    <style:style style:family="text" style:name="T463">
      <style:text-properties fo:font-style="italic"/>
    </style:style>
    <style:style style:family="text" style:name="T464">
      <style:text-properties fo:font-style="italic"/>
    </style:style>
    <style:style style:family="paragraph" style:name="P106">
      <style:paragraph-properties fo:margin-left="0cm" fo:text-indent="0cm"/>
      <style:text-properties fo:font-style="italic"/>
    </style:style>
    <style:style style:family="text" style:name="T465">
      <style:text-properties fo:font-style="italic"/>
    </style:style>
    <style:style style:family="text" style:name="T466">
      <style:text-properties fo:font-style="italic"/>
    </style:style>
    <style:style style:family="text" style:name="T467">
      <style:text-properties fo:font-style="italic"/>
    </style:style>
    <style:style style:parent-style-name="984" style:family="paragraph" style:name="P107">
      <style:paragraph-properties/>
      <style:text-properties fo:color="#4338ca" style:text-line-through-type="none" fo:font-family="HK Grotesk" style:font-family-asian="HK Grotesk" style:font-family-complex="HK Grotesk" fo:font-size="12pt" style:font-size-complex="12pt" fo:language="de" fo:country="DE" fo:font-style="normal" style:text-underline-type="single" style:text-underline-style="solid" style:text-underline-width="auto" style:text-underline-color="font-color" fo:font-weight="bold"/>
    </style:style>
    <style:style style:family="text" style:name="T468">
      <style:text-properties style:text-line-through-type="none" fo:font-style="normal" style:text-underline-type="single" style:text-underline-style="solid" style:text-underline-width="auto" style:text-underline-color="font-color" fo:font-weight="bold"/>
    </style:style>
    <style:style style:family="text" style:name="T469">
      <style:text-properties style:text-line-through-type="none" fo:font-style="normal" style:text-underline-type="single" style:text-underline-style="solid" style:text-underline-width="auto" style:text-underline-color="font-color" fo:font-weight="bold"/>
    </style:style>
    <style:style style:family="text" style:name="T470">
      <style:text-properties style:text-line-through-type="none" fo:font-style="normal" style:text-underline-type="single" style:text-underline-style="solid" style:text-underline-width="auto" style:text-underline-color="font-color" fo:font-weight="bold"/>
    </style:style>
    <style:style style:family="paragraph" style:name="P108">
      <style:paragraph-properties fo:margin-left="0cm" fo:text-indent="0cm"/>
      <style:text-properties fo:font-style="italic"/>
    </style:style>
    <style:style style:family="text" style:name="T471">
      <style:text-properties fo:font-style="italic"/>
    </style:style>
    <style:style style:family="text" style:name="T472">
      <style:text-properties fo:font-style="italic"/>
    </style:style>
    <style:style style:family="text" style:name="T473">
      <style:text-properties fo:font-style="italic"/>
    </style:style>
    <style:style style:parent-style-name="1007" style:list-style-name="WWNum6" style:family="paragraph" style:name="P109">
      <style:paragraph-properties/>
      <style:text-properties fo:font-family="HK Grotesk" style:font-family-asian="HK Grotesk" style:font-family-complex="HK Grotesk" fo:font-size="10pt" fo:language="de" fo:country="DE" fo:font-style="normal" fo:font-weight="bold"/>
    </style:style>
    <style:style style:family="text" style:name="T474">
      <style:text-properties fo:font-style="normal" fo:font-weight="bold"/>
    </style:style>
    <style:style style:family="text" style:name="T475">
      <style:text-properties fo:font-style="normal" fo:font-weight="bold"/>
    </style:style>
    <style:style style:family="text" style:name="T476">
      <style:text-properties fo:font-style="normal" fo:font-weight="bold"/>
    </style:style>
    <style:style style:family="text" style:name="T477">
      <style:text-properties fo:font-style="normal" fo:font-weight="bold"/>
    </style:style>
    <style:style style:family="text" style:name="T478">
      <style:text-properties fo:font-style="normal" fo:font-weight="bold"/>
    </style:style>
    <style:style style:family="paragraph" style:name="P110">
      <style:paragraph-properties fo:margin-left="1.251cm" fo:text-indent="0cm"/>
      <style:text-properties fo:font-style="italic" fo:font-weight="normal"/>
    </style:style>
    <style:style style:family="text" style:name="T479">
      <style:text-properties fo:font-style="italic" fo:font-weight="normal"/>
    </style:style>
    <style:style style:family="text" style:name="T480">
      <style:text-properties fo:font-style="italic" fo:font-weight="normal"/>
    </style:style>
    <style:style style:family="text" style:name="T481">
      <style:text-properties fo:font-style="italic"/>
    </style:style>
    <style:style style:family="text" style:name="T482">
      <style:text-properties fo:font-style="italic" fo:font-weight="normal"/>
    </style:style>
    <style:style style:family="text" style:name="T483">
      <style:text-properties fo:font-style="italic" fo:font-weight="normal"/>
    </style:style>
    <style:style style:family="text" style:name="T484">
      <style:text-properties fo:font-style="italic" fo:font-weight="normal"/>
    </style:style>
    <style:style style:family="text" style:name="T485">
      <style:text-properties fo:font-style="italic" fo:font-weight="normal"/>
    </style:style>
    <style:style style:family="paragraph" style:name="P111">
      <style:paragraph-properties fo:margin-left="1.251cm" fo:text-indent="0cm"/>
      <style:text-properties fo:font-style="italic" fo:font-weight="normal"/>
    </style:style>
    <style:style style:family="text" style:name="T486">
      <style:text-properties fo:font-style="italic" fo:font-weight="normal"/>
    </style:style>
    <style:style style:family="text" style:name="T487">
      <style:text-properties fo:font-style="italic" fo:font-weight="normal"/>
    </style:style>
    <style:style style:family="text" style:name="T488">
      <style:text-properties fo:font-style="italic" fo:font-weight="normal"/>
    </style:style>
    <style:style style:family="paragraph" style:name="P112">
      <style:paragraph-properties fo:margin-left="1.251cm" fo:text-indent="0cm"/>
      <style:text-properties fo:font-style="italic" fo:font-weight="normal"/>
    </style:style>
    <style:style style:family="text" style:name="T489">
      <style:text-properties fo:font-style="italic" fo:font-weight="normal"/>
    </style:style>
    <style:style style:family="text" style:name="T490">
      <style:text-properties fo:font-style="italic" fo:font-weight="normal"/>
    </style:style>
    <style:style style:family="text" style:name="T491">
      <style:text-properties fo:font-style="italic" fo:font-weight="normal"/>
    </style:style>
    <style:style style:family="paragraph" style:name="P113">
      <style:paragraph-properties fo:margin-left="1.251cm" fo:text-indent="0cm"/>
      <style:text-properties fo:font-style="italic" fo:font-weight="normal"/>
    </style:style>
    <style:style style:family="text" style:name="T492">
      <style:text-properties fo:font-style="italic" fo:font-weight="normal"/>
    </style:style>
    <style:style style:family="text" style:name="T493">
      <style:text-properties fo:font-style="italic" fo:font-weight="normal"/>
    </style:style>
    <style:style style:family="text" style:name="T494">
      <style:text-properties fo:font-style="italic" fo:font-weight="normal"/>
    </style:style>
    <style:style style:parent-style-name="1007" style:list-style-name="WWNum8" style:family="paragraph" style:name="P114">
      <style:paragraph-properties/>
      <style:text-properties fo:font-family="HK Grotesk" style:font-family-asian="HK Grotesk" style:font-family-complex="HK Grotesk" fo:font-size="10pt" fo:language="de" fo:country="DE" fo:font-style="normal" fo:font-weight="bold"/>
    </style:style>
    <style:style style:family="text" style:name="T495">
      <style:text-properties fo:font-style="normal" fo:font-weight="bold"/>
    </style:style>
    <style:style style:family="text" style:name="T496">
      <style:text-properties fo:font-style="normal" fo:font-weight="bold"/>
    </style:style>
    <style:style style:family="text" style:name="T497">
      <style:text-properties fo:font-style="normal" fo:font-weight="bold"/>
    </style:style>
    <style:style style:family="text" style:name="T498">
      <style:text-properties fo:font-style="normal" fo:font-weight="bold"/>
    </style:style>
    <style:style style:family="paragraph" style:name="P115">
      <style:paragraph-properties/>
      <style:text-properties fo:font-style="italic" fo:font-weight="normal"/>
    </style:style>
    <style:style style:family="text" style:name="T499">
      <style:text-properties fo:font-style="italic" fo:font-weight="normal"/>
    </style:style>
    <style:style style:family="text" style:name="T500">
      <style:text-properties fo:font-style="italic" fo:font-weight="normal"/>
    </style:style>
    <style:style style:family="text" style:name="T501">
      <style:text-properties fo:font-style="italic" fo:font-weight="normal"/>
    </style:style>
    <style:style style:family="text" style:name="T502">
      <style:text-properties fo:font-style="italic" fo:font-weight="normal"/>
    </style:style>
    <style:style style:family="paragraph" style:name="P116">
      <style:paragraph-properties/>
      <style:text-properties fo:font-style="italic" fo:font-weight="normal"/>
    </style:style>
    <style:style style:family="text" style:name="T503">
      <style:text-properties fo:font-style="italic" fo:font-weight="normal"/>
    </style:style>
    <style:style style:family="text" style:name="T504">
      <style:text-properties fo:font-style="italic" fo:font-weight="normal"/>
    </style:style>
    <style:style style:family="text" style:name="T505">
      <style:text-properties fo:font-style="italic" fo:font-weight="normal"/>
    </style:style>
    <style:style style:family="text" style:name="T506">
      <style:text-properties fo:font-style="italic" fo:font-weight="normal"/>
    </style:style>
    <style:style style:family="paragraph" style:name="P117">
      <style:paragraph-properties/>
      <style:text-properties fo:font-style="italic" fo:font-weight="normal"/>
    </style:style>
    <style:style style:family="text" style:name="T507">
      <style:text-properties fo:font-style="italic" fo:font-weight="normal"/>
    </style:style>
    <style:style style:family="text" style:name="T508">
      <style:text-properties fo:font-style="italic" fo:font-weight="normal"/>
    </style:style>
    <style:style style:family="text" style:name="T509">
      <style:text-properties fo:font-style="italic" fo:font-weight="normal"/>
    </style:style>
    <style:style style:family="text" style:name="T510">
      <style:text-properties fo:font-style="italic" fo:font-weight="normal"/>
    </style:style>
    <style:style style:family="paragraph" style:name="P118">
      <style:paragraph-properties/>
      <style:text-properties fo:font-style="italic" fo:font-weight="normal"/>
    </style:style>
    <style:style style:family="text" style:name="T511">
      <style:text-properties fo:font-style="italic" fo:font-weight="normal"/>
    </style:style>
    <style:style style:family="text" style:name="T512">
      <style:text-properties fo:font-style="italic" fo:font-weight="normal"/>
    </style:style>
    <style:style style:family="text" style:name="T513">
      <style:text-properties fo:font-style="italic" fo:font-weight="normal"/>
    </style:style>
    <style:style style:family="text" style:name="T514">
      <style:text-properties fo:font-style="italic" fo:font-weight="normal"/>
    </style:style>
    <style:style style:family="paragraph" style:name="P119">
      <style:paragraph-properties/>
      <style:text-properties fo:font-style="italic" fo:font-weight="bold"/>
    </style:style>
    <style:style style:family="text" style:name="T515">
      <style:text-properties fo:font-style="italic" fo:font-weight="bold"/>
    </style:style>
    <style:style style:family="text" style:name="T516">
      <style:text-properties fo:font-style="italic" fo:font-weight="bold"/>
    </style:style>
    <style:style style:family="text" style:name="T517">
      <style:text-properties fo:font-style="italic" fo:font-weight="bold"/>
    </style:style>
    <style:style style:parent-style-name="984" style:family="paragraph" style:name="P120">
      <style:paragraph-properties/>
      <style:text-properties fo:color="#4338ca" fo:font-family="HK Grotesk" style:font-family-asian="HK Grotesk" style:font-family-complex="HK Grotesk" fo:font-size="12pt" style:font-size-complex="12pt" fo:language="de" fo:country="DE" fo:font-style="normal" style:text-underline-type="single" style:text-underline-style="solid" style:text-underline-width="auto" style:text-underline-color="font-color" fo:font-weight="bold"/>
    </style:style>
    <style:style style:family="text" style:name="T518">
      <style:text-properties fo:font-style="normal" style:text-underline-type="single" style:text-underline-style="solid" style:text-underline-width="auto" style:text-underline-color="font-color" fo:font-weight="bold"/>
    </style:style>
    <style:style style:family="text" style:name="T519">
      <style:text-properties fo:font-style="normal" style:text-underline-type="single" style:text-underline-style="solid" style:text-underline-width="auto" style:text-underline-color="font-color" fo:font-weight="bold"/>
    </style:style>
    <style:style style:family="text" style:name="T520">
      <style:text-properties fo:font-style="normal" style:text-underline-type="single" style:text-underline-style="solid" style:text-underline-width="auto" style:text-underline-color="font-color" fo:font-weight="bold"/>
    </style:style>
    <style:style style:family="paragraph" style:name="P121">
      <style:paragraph-properties/>
      <style:text-properties fo:font-style="italic" fo:font-weight="normal"/>
    </style:style>
    <style:style style:family="text" style:name="T521">
      <style:text-properties fo:font-style="italic" fo:font-weight="normal"/>
    </style:style>
    <style:style style:family="text" style:name="T522">
      <style:text-properties fo:font-style="italic" fo:font-weight="normal"/>
    </style:style>
    <style:style style:family="text" style:name="T523">
      <style:text-properties fo:font-style="italic" fo:font-weight="normal"/>
    </style:style>
    <style:style style:parent-style-name="1007" style:list-style-name="WWNum10" style:family="paragraph" style:name="P122">
      <style:paragraph-properties/>
      <style:text-properties fo:font-family="HK Grotesk" style:font-family-asian="HK Grotesk" style:font-family-complex="HK Grotesk" fo:font-size="10pt" fo:language="de" fo:country="DE" fo:font-style="normal" fo:font-weight="bold"/>
    </style:style>
    <style:style style:family="text" style:name="T524">
      <style:text-properties fo:font-style="normal" fo:font-weight="bold"/>
    </style:style>
    <style:style style:family="text" style:name="T525">
      <style:text-properties fo:font-style="normal" fo:font-weight="bold"/>
    </style:style>
    <style:style style:family="text" style:name="T526">
      <style:text-properties fo:font-style="normal" fo:font-weight="bold"/>
    </style:style>
    <style:style style:family="text" style:name="T527">
      <style:text-properties fo:font-style="normal" fo:font-weight="bold"/>
    </style:style>
    <style:style style:family="paragraph" style:name="P123">
      <style:paragraph-properties/>
      <style:text-properties fo:font-style="italic" fo:font-weight="normal"/>
    </style:style>
    <style:style style:family="text" style:name="T528">
      <style:text-properties fo:font-style="italic" fo:font-weight="normal"/>
    </style:style>
    <style:style style:family="text" style:name="T529">
      <style:text-properties fo:font-style="italic" fo:font-weight="normal"/>
    </style:style>
    <style:style style:family="text" style:name="T530">
      <style:text-properties fo:font-style="italic" fo:font-weight="normal"/>
    </style:style>
    <style:style style:family="text" style:name="T531">
      <style:text-properties fo:font-style="italic" fo:font-weight="normal"/>
    </style:style>
    <style:style style:family="paragraph" style:name="P124">
      <style:paragraph-properties/>
      <style:text-properties fo:font-style="normal" fo:font-weight="bold"/>
    </style:style>
    <style:style style:family="text" style:name="T532">
      <style:text-properties fo:font-style="normal" fo:font-weight="bold"/>
    </style:style>
    <style:style style:family="text" style:name="T533">
      <style:text-properties fo:font-style="normal" fo:font-weight="bold"/>
    </style:style>
    <style:style style:family="text" style:name="T534">
      <style:text-properties fo:font-style="normal" fo:font-weight="bold"/>
    </style:style>
    <style:style style:family="text" style:name="T535">
      <style:text-properties fo:font-style="normal" fo:font-weight="bold"/>
    </style:style>
    <style:style style:family="paragraph" style:name="P125">
      <style:paragraph-properties/>
      <style:text-properties fo:font-style="normal" fo:font-weight="bold"/>
    </style:style>
    <style:style style:family="text" style:name="T536">
      <style:text-properties fo:font-style="normal" fo:font-weight="bold"/>
    </style:style>
    <style:style style:family="text" style:name="T537">
      <style:text-properties fo:font-style="normal" fo:font-weight="bold"/>
    </style:style>
    <style:style style:family="text" style:name="T538">
      <style:text-properties fo:font-style="normal" fo:font-weight="bold"/>
    </style:style>
    <style:style style:family="paragraph" style:name="P126">
      <style:paragraph-properties/>
      <style:text-properties fo:font-style="normal" fo:font-weight="bold"/>
    </style:style>
    <style:style style:family="text" style:name="T539">
      <style:text-properties fo:font-style="normal" fo:font-weight="bold"/>
    </style:style>
    <style:style style:family="text" style:name="T540">
      <style:text-properties fo:font-style="normal" fo:font-weight="bold"/>
    </style:style>
    <style:style style:family="text" style:name="T541">
      <style:text-properties fo:font-style="normal" fo:font-weight="bold"/>
    </style:style>
    <style:style style:parent-style-name="1007" style:list-style-name="WWNum11" style:family="paragraph" style:name="P127">
      <style:paragraph-properties/>
      <style:text-properties fo:font-family="HK Grotesk" style:font-family-asian="HK Grotesk" style:font-family-complex="HK Grotesk" fo:font-size="10pt" fo:language="de" fo:country="DE" fo:font-style="normal" fo:font-weight="bold"/>
    </style:style>
    <style:style style:family="text" style:name="T542">
      <style:text-properties fo:font-style="normal" fo:font-weight="bold"/>
    </style:style>
    <style:style style:family="text" style:name="T543">
      <style:text-properties fo:font-style="normal" fo:font-weight="bold"/>
    </style:style>
    <style:style style:family="text" style:name="T544">
      <style:text-properties fo:font-style="normal" fo:font-weight="bold"/>
    </style:style>
    <style:style style:family="text" style:name="T545">
      <style:text-properties fo:font-style="normal" fo:font-weight="bold"/>
    </style:style>
    <style:style style:family="paragraph" style:name="P128">
      <style:paragraph-properties/>
      <style:text-properties fo:font-style="normal" fo:font-weight="bold"/>
    </style:style>
    <style:style style:family="text" style:name="T546">
      <style:text-properties fo:font-style="normal" fo:font-weight="bold"/>
    </style:style>
    <style:style style:family="text" style:name="T547">
      <style:text-properties fo:font-style="normal" fo:font-weight="bold"/>
    </style:style>
    <style:style style:family="text" style:name="T548">
      <style:text-properties fo:font-style="normal" fo:font-weight="bold"/>
    </style:style>
    <style:style style:family="text" style:name="T549">
      <style:text-properties fo:font-style="normal" fo:font-weight="bold"/>
    </style:style>
    <style:style style:family="paragraph" style:name="P129">
      <style:paragraph-properties/>
      <style:text-properties fo:font-style="normal" fo:font-weight="bold"/>
    </style:style>
    <style:style style:family="text" style:name="T550">
      <style:text-properties fo:font-style="normal" fo:font-weight="bold"/>
    </style:style>
    <style:style style:family="text" style:name="T551">
      <style:text-properties fo:font-style="normal" fo:font-weight="bold"/>
    </style:style>
    <style:style style:family="text" style:name="T552">
      <style:text-properties fo:font-style="normal" fo:font-weight="bold"/>
    </style:style>
    <style:style style:family="paragraph" style:name="P130">
      <style:paragraph-properties/>
      <style:text-properties fo:font-style="normal" fo:font-weight="bold"/>
    </style:style>
    <style:style style:family="text" style:name="T553">
      <style:text-properties fo:font-style="normal" fo:font-weight="bold"/>
    </style:style>
    <style:style style:family="text" style:name="T554">
      <style:text-properties fo:font-style="normal" fo:font-weight="bold"/>
    </style:style>
    <style:style style:family="text" style:name="T555">
      <style:text-properties fo:font-style="normal" fo:font-weight="bold"/>
    </style:style>
    <style:style style:parent-style-name="1007" style:list-style-name="WWNum12" style:family="paragraph" style:name="P131">
      <style:paragraph-properties/>
      <style:text-properties fo:font-family="HK Grotesk" style:font-family-asian="HK Grotesk" style:font-family-complex="HK Grotesk" fo:font-size="10pt" fo:language="de" fo:country="DE" fo:font-style="normal" fo:font-weight="bold"/>
    </style:style>
    <style:style style:family="text" style:name="T556">
      <style:text-properties fo:font-style="normal" fo:font-weight="bold"/>
    </style:style>
    <style:style style:family="text" style:name="T557">
      <style:text-properties fo:font-style="normal" fo:font-weight="bold"/>
    </style:style>
    <style:style style:family="text" style:name="T558">
      <style:text-properties fo:font-style="normal" fo:font-weight="bold"/>
    </style:style>
    <style:style style:family="text" style:name="T559">
      <style:text-properties fo:font-style="normal" fo:font-weight="bold"/>
    </style:style>
    <style:style style:family="paragraph" style:name="P132">
      <style:paragraph-properties/>
      <style:text-properties fo:font-style="normal" fo:font-weight="bold"/>
    </style:style>
    <style:style style:family="text" style:name="T560">
      <style:text-properties fo:font-style="normal" fo:font-weight="bold"/>
    </style:style>
    <style:style style:family="text" style:name="T561">
      <style:text-properties fo:font-style="normal" fo:font-weight="bold"/>
    </style:style>
    <style:style style:family="text" style:name="T562">
      <style:text-properties fo:font-style="normal" fo:font-weight="bold"/>
    </style:style>
    <style:style style:family="text" style:name="T563">
      <style:text-properties fo:font-style="normal" fo:font-weight="bold"/>
    </style:style>
    <style:style style:family="paragraph" style:name="P133">
      <style:paragraph-properties/>
      <style:text-properties fo:font-style="normal" fo:font-weight="bold"/>
    </style:style>
    <style:style style:family="text" style:name="T564">
      <style:text-properties fo:font-style="normal" fo:font-weight="bold"/>
    </style:style>
    <style:style style:family="text" style:name="T565">
      <style:text-properties fo:font-style="normal" fo:font-weight="bold"/>
    </style:style>
    <style:style style:family="text" style:name="T566">
      <style:text-properties fo:font-style="normal" fo:font-weight="bold"/>
    </style:style>
    <style:style style:parent-style-name="1007" style:list-style-name="WWNum13" style:family="paragraph" style:name="P134">
      <style:paragraph-properties>
        <style:tab-stops>
          <style:tab-stop style:position="4.645cm" style:type="left"/>
        </style:tab-stops>
      </style:paragraph-properties>
      <style:text-properties fo:font-family="HK Grotesk" style:font-family-asian="HK Grotesk" style:font-family-complex="HK Grotesk" fo:font-size="10pt" fo:language="de" fo:country="DE" fo:font-style="normal" fo:font-weight="bold"/>
    </style:style>
    <style:style style:family="text" style:name="T567">
      <style:text-properties fo:font-style="normal" fo:font-weight="bold"/>
    </style:style>
    <style:style style:family="text" style:name="T568">
      <style:text-properties fo:font-style="normal" fo:font-weight="bold"/>
    </style:style>
    <style:style style:family="text" style:name="T569">
      <style:text-properties fo:font-style="normal" fo:font-weight="bold"/>
    </style:style>
    <style:style style:family="text" style:name="T570">
      <style:text-properties fo:font-style="normal" fo:font-weight="bold"/>
    </style:style>
    <style:style style:family="text" style:name="T571">
      <style:text-properties fo:font-style="normal" fo:font-weight="bold"/>
    </style:style>
    <style:style style:family="text" style:name="T572">
      <style:text-properties fo:font-style="normal" fo:font-weight="bold"/>
    </style:style>
    <style:style style:family="paragraph" style:name="P135">
      <style:paragraph-properties fo:margin-left="1.251cm" fo:text-indent="0cm"/>
      <style:text-properties fo:font-style="normal" fo:font-weight="normal"/>
    </style:style>
    <style:style style:family="text" style:name="T573">
      <style:text-properties fo:font-style="normal" fo:font-weight="normal"/>
    </style:style>
    <style:style style:family="text" style:name="T574">
      <style:text-properties fo:font-style="normal" fo:font-weight="normal"/>
    </style:style>
    <style:style style:family="text" style:name="T575">
      <style:text-properties fo:font-style="normal" fo:font-weight="normal"/>
    </style:style>
    <style:style style:family="text" style:name="T576">
      <style:text-properties fo:font-style="normal" fo:font-weight="normal"/>
    </style:style>
    <style:style style:family="paragraph" style:name="P136">
      <style:paragraph-properties/>
      <style:text-properties fo:font-style="normal" fo:font-weight="bold"/>
    </style:style>
    <style:style style:family="text" style:name="T577">
      <style:text-properties fo:font-style="normal" fo:font-weight="bold"/>
    </style:style>
    <style:style style:family="text" style:name="T578">
      <style:text-properties fo:font-style="normal" fo:font-weight="bold"/>
    </style:style>
    <style:style style:family="text" style:name="T579">
      <style:text-properties fo:font-style="normal" fo:font-weight="bold"/>
    </style:style>
    <style:style style:family="text" style:name="T580">
      <style:text-properties fo:font-style="normal" fo:font-weight="bold"/>
    </style:style>
    <style:style style:family="paragraph" style:name="P137">
      <style:paragraph-properties/>
      <style:text-properties fo:font-style="normal" fo:font-weight="bold"/>
    </style:style>
    <style:style style:family="text" style:name="T581">
      <style:text-properties fo:font-style="normal" fo:font-weight="bold"/>
    </style:style>
    <style:style style:family="text" style:name="T582">
      <style:text-properties fo:font-style="normal" fo:font-weight="bold"/>
    </style:style>
    <style:style style:family="text" style:name="T583">
      <style:text-properties fo:font-style="normal" fo:font-weight="bold"/>
    </style:style>
    <style:style style:parent-style-name="1001" style:family="paragraph" style:name="P138">
      <style:paragraph-properties fo:text-align="center"/>
      <style:text-properties fo:color="#4338ca" fo:font-family="HK Grotesk" style:font-family-asian="HK Grotesk" style:font-family-complex="HK Grotesk" fo:font-size="18pt" style:font-size-complex="18pt" fo:language="de" fo:country="DE" fo:font-weight="bold"/>
    </style:style>
    <style:style style:family="text" style:name="T584">
      <style:text-properties/>
    </style:style>
    <style:style style:family="text" style:name="T585">
      <style:text-properties/>
    </style:style>
    <style:style style:family="text" style:name="T586">
      <style:text-properties/>
    </style:style>
    <style:style style:parent-style-name="984" style:family="paragraph" style:name="P139">
      <style:paragraph-properties/>
      <style:text-properties fo:color="#4338ca" fo:font-family="HK Grotesk" style:font-family-asian="HK Grotesk" style:font-family-complex="HK Grotesk" fo:font-size="12pt" style:font-size-complex="12pt" fo:language="de" fo:country="DE" fo:font-style="normal" style:text-underline-type="single" style:text-underline-style="solid" style:text-underline-width="auto" style:text-underline-color="font-color" fo:font-weight="bold"/>
    </style:style>
    <style:style style:family="text" style:name="T587">
      <style:text-properties fo:font-style="normal" style:text-underline-type="single" style:text-underline-style="solid" style:text-underline-width="auto" style:text-underline-color="font-color" fo:font-weight="bold"/>
    </style:style>
    <style:style style:family="text" style:name="T588">
      <style:text-properties fo:font-style="normal" style:text-underline-type="single" style:text-underline-style="solid" style:text-underline-width="auto" style:text-underline-color="font-color" fo:font-weight="bold"/>
    </style:style>
    <style:style style:family="text" style:name="T589">
      <style:text-properties fo:font-style="normal" style:text-underline-type="single" style:text-underline-style="solid" style:text-underline-width="auto" style:text-underline-color="font-color" fo:font-weight="bold"/>
    </style:style>
    <style:style style:family="text" style:name="T590">
      <style:text-properties fo:font-style="normal" style:text-underline-type="single" style:text-underline-style="solid" style:text-underline-width="auto" style:text-underline-color="font-color" fo:font-weight="bold"/>
    </style:style>
    <style:style style:family="paragraph" style:name="P140">
      <style:paragraph-properties fo:margin-left="0cm" fo:text-indent="0cm"/>
      <style:text-properties fo:font-style="normal" fo:font-weight="bold"/>
    </style:style>
    <style:style style:family="text" style:name="T591">
      <style:text-properties fo:font-style="normal" fo:font-weight="bold"/>
    </style:style>
    <style:style style:family="text" style:name="T592">
      <style:text-properties fo:font-style="normal" fo:font-weight="bold"/>
    </style:style>
    <style:style style:family="text" style:name="T593">
      <style:text-properties fo:font-style="normal" fo:font-weight="bold"/>
    </style:style>
    <style:style style:parent-style-name="1007" style:list-style-name="WWNum21" style:family="paragraph" style:name="P141">
      <style:paragraph-properties/>
      <style:text-properties fo:font-family="HK Grotesk" style:font-family-asian="HK Grotesk" style:font-family-complex="HK Grotesk" fo:font-size="10pt" fo:language="de" fo:country="DE" fo:font-style="normal" fo:font-weight="bold"/>
    </style:style>
    <style:style style:family="text" style:name="T594">
      <style:text-properties fo:font-style="normal" fo:font-weight="bold"/>
    </style:style>
    <style:style style:family="text" style:name="T595">
      <style:text-properties fo:font-style="normal" fo:font-weight="bold"/>
    </style:style>
    <style:style style:family="text" style:name="T596">
      <style:text-properties fo:font-style="normal" fo:font-weight="bold"/>
    </style:style>
    <style:style style:family="text" style:name="T597">
      <style:text-properties fo:font-style="normal" fo:font-weight="bold"/>
    </style:style>
    <style:style style:family="paragraph" style:name="P142">
      <style:paragraph-properties fo:margin-left="1.251cm" fo:text-indent="0cm"/>
      <style:text-properties fo:font-style="italic" fo:font-weight="normal"/>
    </style:style>
    <style:style style:family="text" style:name="T598">
      <style:text-properties fo:font-style="italic" fo:font-weight="normal"/>
    </style:style>
    <style:style style:family="text" style:name="T599">
      <style:text-properties fo:font-style="italic" fo:font-weight="normal"/>
    </style:style>
    <style:style style:family="text" style:name="T600">
      <style:text-properties fo:font-style="italic" fo:font-weight="normal"/>
    </style:style>
    <style:style style:family="text" style:name="T601">
      <style:text-properties fo:font-style="italic" fo:font-weight="normal"/>
    </style:style>
    <style:style style:family="paragraph" style:name="P143">
      <style:paragraph-properties/>
      <style:text-properties fo:font-style="normal" fo:font-weight="bold"/>
    </style:style>
    <style:style style:family="text" style:name="T602">
      <style:text-properties fo:font-style="normal" fo:font-weight="bold"/>
    </style:style>
    <style:style style:family="text" style:name="T603">
      <style:text-properties fo:font-style="normal" fo:font-weight="bold"/>
    </style:style>
    <style:style style:family="text" style:name="T604">
      <style:text-properties fo:font-style="normal" fo:font-weight="bold"/>
    </style:style>
    <style:style style:family="text" style:name="T605">
      <style:text-properties fo:font-style="normal" fo:font-weight="bold"/>
    </style:style>
    <style:style style:family="paragraph" style:name="P144">
      <style:paragraph-properties/>
      <style:text-properties fo:font-style="normal" fo:font-weight="bold"/>
    </style:style>
    <style:style style:family="text" style:name="T606">
      <style:text-properties fo:font-style="normal" fo:font-weight="bold"/>
    </style:style>
    <style:style style:family="text" style:name="T607">
      <style:text-properties fo:font-style="normal" fo:font-weight="bold"/>
    </style:style>
    <style:style style:family="text" style:name="T608">
      <style:text-properties fo:font-style="normal" fo:font-weight="bold"/>
    </style:style>
    <style:style style:family="paragraph" style:name="P145">
      <style:paragraph-properties/>
      <style:text-properties fo:font-style="normal" fo:font-weight="bold"/>
    </style:style>
    <style:style style:family="text" style:name="T609">
      <style:text-properties fo:font-style="normal" fo:font-weight="bold"/>
    </style:style>
    <style:style style:family="text" style:name="T610">
      <style:text-properties fo:font-style="normal" fo:font-weight="bold"/>
    </style:style>
    <style:style style:family="text" style:name="T611">
      <style:text-properties fo:font-style="normal" fo:font-weight="bold"/>
    </style:style>
    <style:style style:parent-style-name="1007" style:list-style-name="WWNum18" style:family="paragraph" style:name="P146">
      <style:paragraph-properties/>
      <style:text-properties fo:font-family="HK Grotesk" style:font-family-asian="HK Grotesk" style:font-family-complex="HK Grotesk" fo:font-size="10pt" fo:language="de" fo:country="DE" fo:font-style="normal" fo:font-weight="bold"/>
    </style:style>
    <style:style style:family="text" style:name="T612">
      <style:text-properties fo:font-style="normal" fo:font-weight="bold"/>
    </style:style>
    <style:style style:family="text" style:name="T613">
      <style:text-properties fo:font-style="normal" fo:font-weight="bold"/>
    </style:style>
    <style:style style:family="text" style:name="T614">
      <style:text-properties fo:font-style="normal" fo:font-weight="bold"/>
    </style:style>
    <style:style style:family="text" style:name="T615">
      <style:text-properties fo:font-style="normal" fo:font-weight="bold"/>
    </style:style>
    <style:style style:family="paragraph" style:name="P147">
      <style:paragraph-properties fo:margin-left="1.251cm" fo:text-indent="0cm"/>
      <style:text-properties fo:font-style="normal" fo:font-weight="bold"/>
    </style:style>
    <style:style style:family="text" style:name="T616">
      <style:text-properties fo:font-style="normal" fo:font-weight="bold"/>
    </style:style>
    <style:style style:family="text" style:name="T617">
      <style:text-properties fo:font-style="italic" fo:font-weight="normal"/>
    </style:style>
    <style:style style:family="text" style:name="T618">
      <style:text-properties fo:font-style="normal" fo:font-weight="bold"/>
    </style:style>
    <style:style style:family="text" style:name="T619">
      <style:text-properties fo:font-style="normal" fo:font-weight="bold"/>
    </style:style>
    <style:style style:family="text" style:name="T620">
      <style:text-properties fo:font-style="normal" fo:font-weight="bold"/>
    </style:style>
    <style:style style:family="paragraph" style:name="P148">
      <style:paragraph-properties/>
      <style:text-properties fo:font-style="normal" fo:font-weight="bold"/>
    </style:style>
    <style:style style:family="text" style:name="T621">
      <style:text-properties fo:font-style="normal" fo:font-weight="bold"/>
    </style:style>
    <style:style style:family="text" style:name="T622">
      <style:text-properties fo:font-style="normal" fo:font-weight="bold"/>
    </style:style>
    <style:style style:family="text" style:name="T623">
      <style:text-properties fo:font-style="normal" fo:font-weight="bold"/>
    </style:style>
    <style:style style:family="text" style:name="T624">
      <style:text-properties fo:font-style="normal" fo:font-weight="bold"/>
    </style:style>
    <style:style style:family="paragraph" style:name="P149">
      <style:paragraph-properties/>
      <style:text-properties/>
    </style:style>
    <style:style style:family="text" style:name="T625">
      <style:text-properties/>
    </style:style>
    <style:style style:family="text" style:name="T626">
      <style:text-properties/>
    </style:style>
    <style:style style:family="text" style:name="T627">
      <style:text-properties/>
    </style:style>
    <style:style style:family="paragraph" style:name="P150">
      <style:paragraph-properties/>
      <style:text-properties fo:font-style="italic" fo:font-weight="bold"/>
    </style:style>
    <style:style style:family="text" style:name="T628">
      <style:text-properties fo:font-style="italic" fo:font-weight="bold"/>
    </style:style>
    <style:style style:family="text" style:name="T629">
      <style:text-properties fo:font-style="italic" fo:font-weight="bold"/>
    </style:style>
    <style:style style:family="text" style:name="T630">
      <style:text-properties fo:font-style="italic" fo:font-weight="bold"/>
    </style:style>
    <style:style style:parent-style-name="984" style:family="paragraph" style:name="P151">
      <style:paragraph-properties/>
      <style:text-properties fo:color="#4338ca" fo:font-family="HK Grotesk" style:font-family-asian="HK Grotesk" style:font-family-complex="HK Grotesk" fo:font-size="12pt" style:font-size-complex="12pt" fo:language="de" fo:country="DE" fo:font-style="normal" style:text-underline-type="single" style:text-underline-style="solid" style:text-underline-width="auto" style:text-underline-color="font-color" fo:font-weight="bold"/>
    </style:style>
    <style:style style:family="text" style:name="T631">
      <style:text-properties fo:font-style="normal" style:text-underline-type="single" style:text-underline-style="solid" style:text-underline-width="auto" style:text-underline-color="font-color"/>
    </style:style>
    <style:style style:family="text" style:name="T632">
      <style:text-properties fo:font-style="normal" style:text-underline-type="single" style:text-underline-style="solid" style:text-underline-width="auto" style:text-underline-color="font-color" fo:font-weight="bold"/>
    </style:style>
    <style:style style:family="text" style:name="T633">
      <style:text-properties fo:font-style="normal" style:text-underline-type="single" style:text-underline-style="solid" style:text-underline-width="auto" style:text-underline-color="font-color" fo:font-weight="bold"/>
    </style:style>
    <style:style style:family="text" style:name="T634">
      <style:text-properties fo:font-style="normal" style:text-underline-type="single" style:text-underline-style="solid" style:text-underline-width="auto" style:text-underline-color="font-color" fo:font-weight="bold"/>
    </style:style>
    <style:style style:family="paragraph" style:name="P152">
      <style:paragraph-properties/>
      <style:text-properties/>
    </style:style>
    <style:style style:family="text" style:name="T635">
      <style:text-properties/>
    </style:style>
    <style:style style:family="text" style:name="T636">
      <style:text-properties/>
    </style:style>
    <style:style style:family="text" style:name="T637">
      <style:text-properties/>
    </style:style>
    <style:style style:parent-style-name="1007" style:list-style-name="WWNum19" style:family="paragraph" style:name="P153">
      <style:paragraph-properties/>
      <style:text-properties fo:font-family="HK Grotesk" style:font-family-asian="HK Grotesk" style:font-family-complex="HK Grotesk" fo:font-size="10pt" fo:language="de" fo:country="DE" fo:font-style="normal" fo:font-weight="bold"/>
    </style:style>
    <style:style style:family="text" style:name="T638">
      <style:text-properties fo:font-style="normal" fo:font-weight="bold"/>
    </style:style>
    <style:style style:family="text" style:name="T639">
      <style:text-properties fo:font-style="normal" fo:font-weight="bold"/>
    </style:style>
    <style:style style:family="text" style:name="T640">
      <style:text-properties fo:font-style="normal" fo:font-weight="bold"/>
    </style:style>
    <style:style style:family="text" style:name="T641">
      <style:text-properties fo:font-style="normal" fo:font-weight="bold"/>
    </style:style>
    <style:style style:family="paragraph" style:name="P154">
      <style:paragraph-properties fo:margin-left="1.251cm" fo:margin-right="0cm" fo:text-indent="0cm"/>
      <style:text-properties fo:font-style="italic" fo:font-weight="normal"/>
    </style:style>
    <style:style style:family="text" style:name="T642">
      <style:text-properties fo:font-style="italic" fo:font-weight="normal"/>
    </style:style>
    <style:style style:family="text" style:name="T643">
      <style:text-properties fo:font-style="italic" fo:font-weight="normal"/>
    </style:style>
    <style:style style:family="text" style:name="T644">
      <style:text-properties fo:font-style="italic" fo:font-weight="normal"/>
    </style:style>
    <style:style style:family="paragraph" style:name="P155">
      <style:paragraph-properties/>
      <style:text-properties fo:font-style="normal" fo:font-weight="bold"/>
    </style:style>
    <style:style style:family="text" style:name="T645">
      <style:text-properties fo:font-style="normal" fo:font-weight="bold"/>
    </style:style>
    <style:style style:family="text" style:name="T646">
      <style:text-properties fo:font-style="normal" fo:font-weight="bold"/>
    </style:style>
    <style:style style:family="text" style:name="T647">
      <style:text-properties fo:font-style="normal" fo:font-weight="bold"/>
    </style:style>
    <style:style style:family="text" style:name="T648">
      <style:text-properties fo:font-style="normal" fo:font-weight="bold"/>
    </style:style>
    <style:style style:family="paragraph" style:name="P156">
      <style:paragraph-properties/>
      <style:text-properties fo:font-style="normal" fo:font-weight="bold"/>
    </style:style>
    <style:style style:family="text" style:name="T649">
      <style:text-properties fo:font-style="normal" fo:font-weight="bold"/>
    </style:style>
    <style:style style:family="text" style:name="T650">
      <style:text-properties fo:font-style="normal" fo:font-weight="bold"/>
    </style:style>
    <style:style style:family="text" style:name="T651">
      <style:text-properties fo:font-style="normal" fo:font-weight="bold"/>
    </style:style>
    <style:style style:family="paragraph" style:name="P157">
      <style:paragraph-properties/>
      <style:text-properties fo:font-style="normal" fo:font-weight="bold"/>
    </style:style>
    <style:style style:family="text" style:name="T652">
      <style:text-properties fo:font-style="normal" fo:font-weight="bold"/>
    </style:style>
    <style:style style:family="text" style:name="T653">
      <style:text-properties fo:font-style="normal" fo:font-weight="bold"/>
    </style:style>
    <style:style style:family="text" style:name="T654">
      <style:text-properties fo:font-style="normal" fo:font-weight="bold"/>
    </style:style>
    <style:style style:parent-style-name="1007" style:list-style-name="WWNum22" style:family="paragraph" style:name="P158">
      <style:paragraph-properties/>
      <style:text-properties fo:font-family="HK Grotesk" style:font-family-asian="HK Grotesk" style:font-family-complex="HK Grotesk" fo:font-size="10pt" fo:language="de" fo:country="DE" fo:font-style="normal" fo:font-weight="bold"/>
    </style:style>
    <style:style style:family="text" style:name="T655">
      <style:text-properties fo:font-style="normal" fo:font-weight="bold"/>
    </style:style>
    <style:style style:family="text" style:name="T656">
      <style:text-properties fo:font-style="normal" fo:font-weight="bold"/>
    </style:style>
    <style:style style:family="text" style:name="T657">
      <style:text-properties fo:font-style="normal" fo:font-weight="bold"/>
    </style:style>
    <style:style style:family="text" style:name="T658">
      <style:text-properties fo:font-style="normal" fo:font-weight="bold"/>
    </style:style>
    <style:style style:family="paragraph" style:name="P159">
      <style:paragraph-properties/>
      <style:text-properties fo:font-style="normal" fo:font-weight="bold"/>
    </style:style>
    <style:style style:family="text" style:name="T659">
      <style:text-properties fo:font-style="normal" fo:font-weight="bold"/>
    </style:style>
    <style:style style:family="text" style:name="T660">
      <style:text-properties fo:font-style="italic" fo:font-weight="normal"/>
    </style:style>
    <style:style style:parent-style-name="1029" style:family="text" style:name="T661">
      <style:text-properties fo:font-style="italic" fo:font-weight="normal"/>
    </style:style>
    <style:style style:family="text" style:name="T662">
      <style:text-properties fo:font-style="italic" fo:font-weight="normal"/>
    </style:style>
    <style:style style:parent-style-name="1029" style:family="text" style:name="T663">
      <style:text-properties fo:font-style="italic" fo:font-weight="normal"/>
    </style:style>
    <style:style style:family="text" style:name="T664">
      <style:text-properties fo:font-style="italic" fo:font-weight="normal"/>
    </style:style>
    <style:style style:family="text" style:name="T665">
      <style:text-properties fo:font-style="normal" fo:font-weight="bold"/>
    </style:style>
    <style:style style:family="text" style:name="T666">
      <style:text-properties fo:font-style="normal" fo:font-weight="bold"/>
    </style:style>
    <style:style style:family="paragraph" style:name="P160">
      <style:paragraph-properties/>
      <style:text-properties fo:font-style="normal" fo:font-weight="bold"/>
    </style:style>
    <style:style style:family="text" style:name="T667">
      <style:text-properties fo:font-style="normal" fo:font-weight="bold"/>
    </style:style>
    <style:style style:family="text" style:name="T668">
      <style:text-properties fo:font-style="normal" fo:font-weight="bold"/>
    </style:style>
    <style:style style:family="text" style:name="T669">
      <style:text-properties fo:font-style="normal" fo:font-weight="bold"/>
    </style:style>
    <style:style style:family="text" style:name="T670">
      <style:text-properties fo:font-style="normal" fo:font-weight="bold"/>
    </style:style>
    <style:style style:family="paragraph" style:name="P161">
      <style:paragraph-properties/>
      <style:text-properties fo:font-style="normal" fo:font-weight="bold"/>
    </style:style>
    <style:style style:family="text" style:name="T671">
      <style:text-properties fo:font-style="normal" fo:font-weight="bold"/>
    </style:style>
    <style:style style:family="text" style:name="T672">
      <style:text-properties fo:font-style="normal" fo:font-weight="bold"/>
    </style:style>
    <style:style style:family="text" style:name="T673">
      <style:text-properties fo:font-style="normal" fo:font-weight="bold"/>
    </style:style>
    <style:style style:family="paragraph" style:name="P162">
      <style:paragraph-properties/>
      <style:text-properties fo:font-style="normal" fo:font-weight="bold"/>
    </style:style>
    <style:style style:family="text" style:name="T674">
      <style:text-properties fo:font-style="normal" fo:font-weight="bold"/>
    </style:style>
    <style:style style:family="text" style:name="T675">
      <style:text-properties fo:font-style="normal" fo:font-weight="bold"/>
    </style:style>
    <style:style style:family="text" style:name="T676">
      <style:text-properties fo:font-style="normal" fo:font-weight="bold"/>
    </style:style>
    <style:style style:family="paragraph" style:name="P163">
      <style:paragraph-properties/>
      <style:text-properties/>
    </style:style>
    <style:style style:family="text" style:name="T677">
      <style:text-properties/>
    </style:style>
    <style:style style:family="text" style:name="T678">
      <style:text-properties/>
    </style:style>
    <style:style style:family="text" style:name="T679">
      <style:text-properties/>
    </style:style>
    <style:style style:parent-style-name="1001" style:family="paragraph" style:name="P164">
      <style:paragraph-properties fo:text-align="center"/>
      <style:text-properties fo:color="#4338ca" fo:font-family="HK Grotesk" style:font-family-asian="HK Grotesk" style:font-family-complex="HK Grotesk" fo:font-size="18pt" style:font-size-complex="18pt" fo:language="de" fo:country="DE" fo:font-weight="bold"/>
    </style:style>
    <style:style style:family="text" style:name="T680">
      <style:text-properties/>
    </style:style>
    <style:style style:family="text" style:name="T681">
      <style:text-properties/>
    </style:style>
    <style:style style:family="text" style:name="T682">
      <style:text-properties/>
    </style:style>
    <style:style style:parent-style-name="1001" style:family="paragraph" style:name="P165">
      <style:paragraph-properties fo:text-align="center"/>
      <style:text-properties fo:color="#4338ca" fo:font-family="HK Grotesk" style:font-family-asian="HK Grotesk" style:font-family-complex="HK Grotesk" fo:font-size="18pt" style:font-size-complex="18pt" fo:language="de" fo:country="DE" fo:font-weight="bold"/>
    </style:style>
    <style:style style:family="text" style:name="T683">
      <style:text-properties/>
    </style:style>
    <style:style style:family="text" style:name="T684">
      <style:text-properties/>
    </style:style>
    <style:style style:family="text" style:name="T685">
      <style:text-properties/>
    </style:style>
    <style:style style:parent-style-name="1001" style:family="paragraph" style:name="P166">
      <style:paragraph-properties fo:text-align="left"/>
      <style:text-properties fo:color="#4338ca" fo:font-family="HK Grotesk" style:font-family-asian="HK Grotesk" style:font-family-complex="HK Grotesk" fo:font-size="18pt" style:font-size-complex="18pt" fo:language="de" fo:country="DE" fo:font-weight="bold"/>
    </style:style>
    <style:style style:family="text" style:name="T686">
      <style:text-properties/>
    </style:style>
    <style:style style:family="text" style:name="T687">
      <style:text-properties/>
    </style:style>
    <style:style style:family="text" style:name="T688">
      <style:text-properties/>
    </style:style>
    <style:style style:parent-style-name="1001" style:family="paragraph" style:name="P167">
      <style:paragraph-properties fo:text-align="center"/>
      <style:text-properties fo:color="#4338ca" fo:font-family="HK Grotesk" style:font-family-asian="HK Grotesk" style:font-family-complex="HK Grotesk" fo:font-size="18pt" style:font-size-complex="18pt" fo:language="de" fo:country="DE" fo:font-weight="bold"/>
    </style:style>
    <style:style style:family="text" style:name="T689">
      <style:text-properties/>
    </style:style>
    <style:style style:family="text" style:name="T690">
      <style:text-properties/>
    </style:style>
    <style:style style:family="text" style:name="T691">
      <style:text-properties/>
    </style:style>
    <style:style style:parent-style-name="1001" style:family="paragraph" style:name="P168">
      <style:paragraph-properties fo:text-align="center"/>
      <style:text-properties fo:color="#4338ca" fo:font-family="HK Grotesk" style:font-family-asian="HK Grotesk" style:font-family-complex="HK Grotesk" fo:font-size="18pt" style:font-size-complex="18pt" fo:language="de" fo:country="DE" fo:font-weight="bold"/>
    </style:style>
    <style:style style:family="text" style:name="T692">
      <style:text-properties/>
    </style:style>
    <style:style style:family="text" style:name="T693">
      <style:text-properties/>
    </style:style>
    <style:style style:family="text" style:name="T694">
      <style:text-properties/>
    </style:style>
    <style:style style:parent-style-name="1001" style:family="paragraph" style:name="P169">
      <style:paragraph-properties fo:text-align="center"/>
      <style:text-properties fo:color="#4338ca" fo:font-family="HK Grotesk" style:font-family-asian="HK Grotesk" style:font-family-complex="HK Grotesk" fo:font-size="18pt" style:font-size-complex="18pt" fo:language="de" fo:country="DE" fo:font-weight="bold"/>
    </style:style>
    <style:style style:family="text" style:name="T695">
      <style:text-properties/>
    </style:style>
    <style:style style:family="text" style:name="T696">
      <style:text-properties/>
    </style:style>
    <style:style style:family="text" style:name="T697">
      <style:text-properties/>
    </style:style>
    <style:style style:parent-style-name="1001" style:family="paragraph" style:name="P170">
      <style:paragraph-properties fo:text-align="left"/>
      <style:text-properties fo:color="#4338ca" fo:font-family="HK Grotesk" style:font-family-asian="HK Grotesk" style:font-family-complex="HK Grotesk" fo:font-size="18pt" style:font-size-complex="18pt" fo:language="de" fo:country="DE" fo:font-weight="bold"/>
    </style:style>
    <style:style style:family="text" style:name="T698">
      <style:text-properties/>
    </style:style>
    <style:style style:family="text" style:name="T699">
      <style:text-properties/>
    </style:style>
    <style:style style:family="text" style:name="T700">
      <style:text-properties/>
    </style:style>
  </office:automatic-styles>
  <office:body>
    <office:text text:use-soft-page-breaks="true">
      <text:p text:style-name="P49"><text:span text:style-name="T320"/><text:span text:style-name="T321">Open Data Ranking 2026</text:span><text:span text:style-name="T322"/><text:span text:style-name="T323"/></text:p>
      <text:p text:style-name="P59"><text:span text:style-name="T324">Fragebogen an die Open-Data-Stellen</text:span><text:span text:style-name="T325"/><text:span text:style-name="T326"/></text:p>
      <text:p text:style-name="P60"><text:span text:style-name="T327"/><text:span text:style-name="T328"/><text:span text:style-name="T329"/></text:p>
      <text:p text:style-name="P61"><text:span text:style-name="T330">Liebe Open-Data-Verantwortlichen - vielen Dank dass Sie sich die Zeit nehmen, um diesen Fragebogen zu beantworten!</text:span><text:span text:style-name="T331"/></text:p>
      <text:p text:style-name="P62"><text:span text:style-name="T332"/><text:span text:style-name="T333"/></text:p>
      <text:p text:style-name="P63"><text:span text:style-name="T334">Die vorliegenden Fragen dienen dazu, den Status quo der Deutschen Open-Data-Landschaft besser zu erfassen. Ihre Antworten dienen als Hintergrund für das nächste Open Data Ranking und werden für den Begleittext in der Broschüre aufgearbeitet sowie als tabell</text:span><text:span text:style-name="T335">arischer Anhang auf der </text:span><text:a xlink:href="https://opendataranking.de/" xlink:type="simple"><text:span text:style-name="T336">Website</text:span></text:a><text:span text:style-name="T337"> veröffentlicht.</text:span><text:span text:style-name="T338"/></text:p>
      <text:p text:style-name="P64"><text:span text:style-name="T339"/><text:span text:style-name="T340"/></text:p>
      <text:p text:style-name="P65"><text:span text:style-name="T341">Eine Beantwortung der Fragen ist nicht zwingend für das nächste Ranking erforderlich - nicht-teilnehmende Länder werden dadurch nicht schlechter bewertet.</text:span><text:span text:style-name="T342"/></text:p>
      <text:p text:style-name="P66"><text:span text:style-name="T343"/><text:span text:style-name="T344"/></text:p>
      <text:p text:style-name="P67"><text:span text:style-name="T345">Vielmehr möchten wir Ihnen die Gelegenheit geben, mit uns in den Austausch zu treten, auf Verbesserungen für das bisherige Ranking hinzuweisen und Einblicke in Open-Data-Prozesse zu geben, die wir von außen nicht einsehen können.</text:span><text:span text:style-name="T346"/></text:p>
      <text:p text:style-name="P68"><text:span text:style-name="T347"/><text:span text:style-name="T348"/></text:p>
      <text:p text:style-name="P69"><text:span text:style-name="T349">In die Bewertung fließen lediglich Informationen ein, die sich auf die drei folgenden, bereits </text:span><text:a xlink:href="https://opendataranking.de/methodik/" xlink:type="simple"><text:span text:style-name="T350">existierenden Bewertungskriterien </text:span></text:a><text:span text:style-name="T351">aus dem Open Data Ranking beziehen:</text:span><text:span text:style-name="T352"/></text:p>
      <text:p text:style-name="P70"><text:span text:style-name="T353"/><text:span text:style-name="T354"/></text:p>
      <text:list text:style-name="WWNum31" text:continue-numbering="true">
        <text:list-item>
          <text:p text:style-name="P71"><text:span text:style-name="T355">Gibt es beschriebene Schnittstellen / Automatisierungsbestrebungen zur Anbindung von Fachverfahren?</text:span><text:span text:style-name="T356"/></text:p>
        </text:list-item>
        <text:list-item>
          <text:p text:style-name="P72"><text:span text:style-name="T357">Gibt es interne Unterstützungsangebote?</text:span><text:span text:style-name="T358"/></text:p>
        </text:list-item>
        <text:list-item>
          <text:p text:style-name="P73"><text:span text:style-name="T359">Gibt es Öffentlichkeitsarbeit / Austauschformate mit der Community?</text:span><text:span text:style-name="T360"/></text:p>
        </text:list-item>
      </text:list>
      <text:p text:style-name="P74"><text:span text:style-name="T361"/><text:span text:style-name="T362"/></text:p>
      <text:p text:style-name="P75"><text:span text:style-name="T363">Sie haben bis zum 31. Juli, 18 Uhr Zeit für die Beantwortung über das </text:span><text:a xlink:href="https://cloud.okfn.de/apps/forms/s/iLiT2tnLfWppxyLederKQcbc" xlink:type="simple"><text:span text:style-name="T364">Online-Formular</text:span></text:a><text:span text:style-name="T365"> oder dieses Dokument. Die Veröffentlichung des Rankings 2026 ist für den Herbst vorgesehen.</text:span><text:span text:style-name="T366"/></text:p>
      <text:p text:style-name="P76"><text:span text:style-name="T367"/><text:span text:style-name="T368"/></text:p>
      <text:p text:style-name="P77"><text:span text:style-name="T369">Hinweis: Die Antworten können nicht zwischengespeichert werden.</text:span><text:span text:style-name="T370"/></text:p>
      <text:p text:style-name="P78"><text:span text:style-name="T371"/><text:span text:style-name="T372"/></text:p>
      <text:p text:style-name="P79"><text:span text:style-name="T373">Bei Fragen zum Prozess oder sonstigen Anmerkungen können Sie sich gerne be</text:span><text:span text:style-name="T374">i </text:span><text:a xlink:href="mailto:opendata@okfn.de" xlink:type="simple"><text:span text:style-name="T375">ope</text:span><text:span text:style-name="T376">ndata@okfn.de</text:span></text:a><text:span text:style-name="T377"> melden.</text:span><text:span text:style-name="T378"/></text:p>
      <text:p text:style-name="P80"><text:span text:style-name="T379"/><text:span text:style-name="T380"/></text:p>
      <text:p text:style-name="P81"><text:span text:style-name="T381">Dénes Jäger</text:span><text:span text:style-name="T382"/></text:p>
      <text:p text:style-name="P82"><text:span text:style-name="T383">Projektkoordinator Policy &amp; Open Data</text:span><text:span text:style-name="T384"/></text:p>
      <text:p text:style-name="P83"><text:span text:style-name="T385">Open Knowledge Foundation Deutschland e.V.</text:span><text:span text:style-name="T386"/></text:p>
      <text:p text:style-name="P84"><text:span text:style-name="T387"/><text:a xlink:href="https://okfn.de/projekte/opendata/" xlink:type="simple"><text:span text:style-name="T388">https://okfn.de/projekte/opendata/</text:span></text:a><text:span text:style-name="T389"> | </text:span><text:a xlink:href="mailto:denes.jaeger@okfn.de" xlink:type="simple"><text:span text:style-name="T390">denes.jaeger@okfn.de</text:span></text:a><text:span text:style-name="T391"/><text:span/></text:p>
      <text:p text:style-name="P85"><text:span text:style-name="T392"/><text:span text:style-name="T393"/><text:span text:style-name="T394"/></text:p>
      <text:p text:style-name="P86"><text:span text:style-name="T395"/><text:span text:style-name="T396"/><text:span text:style-name="T397"/></text:p>
      <text:p text:style-name="P87"><text:span text:style-name="T398"/><text:span text:style-name="T399"/><text:span text:style-name="T400"/></text:p>
      <text:p text:style-name="P88"><text:span text:style-name="T401"/><text:span text:style-name="T402"/><text:span text:style-name="T403"/></text:p>
      <text:p text:style-name="P89"><text:span text:style-name="T404"/><text:span text:style-name="T405"/><text:span text:style-name="T406"/></text:p>
      <text:p text:style-name="P90"><text:span text:style-name="T407"/><text:span text:style-name="T408"/><text:span text:style-name="T409"/></text:p>
      <text:p text:style-name="P91"><text:span text:style-name="T410">Kontaktdaten</text:span><text:span text:style-name="T411"/><text:span text:style-name="T412"/></text:p>
      <text:p text:style-name="P92"><text:span text:style-name="T413"/><text:span text:style-name="T414"/><text:span text:style-name="T415"/></text:p>
      <text:list text:style-name="WWNum3" text:continue-numbering="true">
        <text:list-item>
          <text:p text:style-name="P93"><text:span text:style-name="T416"/><text:span text:style-name="T417">Für welches Bundesland bzw. Datenbereitsteller füllen Sie diesen Fragebogen aus?</text:span><text:span text:style-name="T418"/><text:span text:style-name="T419"/></text:p>
        </text:list-item>
      </text:list>
      <text:p text:style-name="P94"><text:span text:style-name="T420"/><text:span text:style-name="T421">Bitte füllen Sie den Fragebogen nur einmal pro Bundesland aus. Sollten Ihnen im Nachgang noch Korrekturen oder Erweiterungen einfallen, senden Sie diese bitte an </text:span><text:a xlink:href="mailto:opendata@okfn.de" xlink:type="simple"><text:span text:style-name="T422">opendata@okfn.de</text:span></text:a><text:span text:style-name="T423">.</text:span><text:span text:style-name="T424"/><text:span text:style-name="T425"/></text:p>
      <text:p text:style-name="P95"><text:span text:style-name="T426"/><text:span text:style-name="T427"><text:tab/></text:span><text:span text:style-name="T428"/><text:span text:style-name="T429"/></text:p>
      <text:p text:style-name="P96"><text:span text:style-name="T430"/><text:span text:style-name="T431"/><text:span text:style-name="T432"/></text:p>
      <text:p text:style-name="P97"><text:span text:style-name="T433"/><text:span text:style-name="T434"/><text:span text:style-name="T435"/></text:p>
      <text:p text:style-name="P98"><text:span text:style-name="T436"/><text:span text:style-name="T437">Kontaktdaten der ausfüllenden Stelle(n)</text:span><text:span text:style-name="T438"/><text:span text:style-name="T439"/></text:p>
      <text:p text:style-name="P99"><text:span text:style-name="T440"/><text:span text:style-name="T441">Gerne mit Name/Funktion/Zuständiger Stelle/Funktionsemailadresse</text:span><text:span text:style-name="T442"/><text:span text:style-name="T443"/></text:p>
      <text:p text:style-name="P100"><text:span text:style-name="T444"/><text:span text:style-name="T445"><text:tab/></text:span><text:span text:style-name="T446"/><text:span text:style-name="T447"/></text:p>
      <text:p text:style-name="P101"><text:span text:style-name="T448"/><text:span text:style-name="T449"/><text:span text:style-name="T450"/></text:p>
      <text:p text:style-name="P102"><text:span text:style-name="T451"/><text:span text:style-name="T452"/><text:span text:style-name="T453"/></text:p>
      <text:p text:style-name="P103"><text:span text:style-name="T454"/><text:span text:style-name="T455">Dürfen diese Kontaktdaten auf der Website / in der Publikation des Open Data Rankings geteilt werden?</text:span><text:span text:style-name="T456"/><text:span text:style-name="T457"/></text:p>
      <text:p text:style-name="P104"><text:span text:style-name="T458"/><text:span text:style-name="T459"><text:tab/></text:span><text:span text:style-name="T460"/><text:span text:style-name="T461"/></text:p>
      <text:p text:style-name="P105"><text:span text:style-name="T462"/><text:span text:style-name="T463"/><text:span text:style-name="T464"/></text:p>
      <text:p text:style-name="P106"><text:span text:style-name="T465"/><text:span text:style-name="T466"/><text:span text:style-name="T467"/></text:p>
      <text:p text:style-name="P107"><text:span text:style-name="T468">Interne Organisation</text:span><text:span text:style-name="T469"/><text:span text:style-name="T470"/></text:p>
      <text:p text:style-name="P108"><text:span text:style-name="T471"/><text:span text:style-name="T472"/><text:span text:style-name="T473"/></text:p>
      <text:list text:style-name="WWNum6" text:continue-numbering="true">
        <text:list-item>
          <text:p text:style-name="P109"><text:span text:style-name="T474"/><text:span text:style-name="T475"/><text:span text:style-name="T476">Wo ist das Thema Open Data in Ihrem Bundesland / im Bund angesiedelt?</text:span><text:span text:style-name="T477"/><text:span text:style-name="T478"/></text:p>
        </text:list-item>
      </text:list>
      <text:p text:style-name="P110"><text:span text:style-name="T479"/><text:span text:style-name="T480">Welche Stellen tragen zur Umsetzung bei, z.B. für Portalbetrieb und </text:span><text:span text:style-name="T481">Datenbereitstellung</text:span><text:span text:style-name="T482">?</text:span><text:span text:style-name="T483"><text:s/></text:span><text:span text:style-name="T484"/><text:span text:style-name="T485"/></text:p>
      <text:p text:style-name="P111"><text:span text:style-name="T486"/><text:span text:style-name="T487"/><text:span text:style-name="T488"/></text:p>
      <text:p text:style-name="P112"><text:span text:style-name="T489"/><text:span text:style-name="T490"/><text:span text:style-name="T491"/></text:p>
      <text:p text:style-name="P113"><text:span text:style-name="T492"/><text:span text:style-name="T493"/><text:span text:style-name="T494"/></text:p>
      <text:list text:style-name="WWNum8" text:continue-numbering="true">
        <text:list-item>
          <text:p text:style-name="P114"><text:span text:style-name="T495"/><text:span text:style-name="T496">Falls möglich, geben Sie einen Überblick über die Anzahl der für Open Data zuständigen VZÄ in Ressorts, nachgeordneten Behörden und Dienststellen der Landesregierung sowie die für Open Data im Landes-/Bundeshaushalt zur Verfügung gestellten Mittel.</text:span><text:span text:style-name="T497"/><text:span text:style-name="T498"/></text:p>
        </text:list-item>
      </text:list>
      <text:p text:style-name="P115"><text:span text:style-name="T499"><text:tab/></text:span><text:span text:style-name="T500">Falls vorhanden, verweisen Sie gerne auf öffentlich einsehbare Quellen, Haushaltspläne o.ä. </text:span><text:span text:style-name="T501"/><text:span text:style-name="T502"/></text:p>
      <text:p text:style-name="P116"><text:span text:style-name="T503"/><text:span text:style-name="T504"><text:tab/></text:span><text:span text:style-name="T505"/><text:span text:style-name="T506"/></text:p>
      <text:p text:style-name="P117"><text:span text:style-name="T507"/><text:span text:style-name="T508"><text:tab/></text:span><text:span text:style-name="T509"/><text:span text:style-name="T510"/></text:p>
      <text:p text:style-name="P118"><text:span text:style-name="T511"/><text:span text:style-name="T512"><text:tab/></text:span><text:span text:style-name="T513"/><text:span text:style-name="T514"/></text:p>
      <text:p text:style-name="P119"><text:span text:style-name="T515"/><text:span text:style-name="T516"/><text:span text:style-name="T517"/></text:p>
      <text:p text:style-name="P120"><text:span text:style-name="T518">Prozesse &amp; Qualitätssicherung</text:span><text:span text:style-name="T519"/><text:span text:style-name="T520"/></text:p>
      <text:p text:style-name="P121"><text:span text:style-name="T521"/><text:span text:style-name="T522"/><text:span text:style-name="T523"/></text:p>
      <text:list text:style-name="WWNum10" text:continue-numbering="true">
        <text:list-item>
          <text:p text:style-name="P122"><text:span text:style-name="T524"/><text:span text:style-name="T525">Wie sieht bei Ihnen der Prozess für die Veröffentlichung neuer Daten/Anbindung von Fachverfahren aus?</text:span><text:span text:style-name="T526"/><text:span text:style-name="T527"/></text:p>
        </text:list-item>
      </text:list>
      <text:p text:style-name="P123"><text:span text:style-name="T528"><text:tab/></text:span><text:span text:style-name="T529">Gibt es z.B. ein festgelegtes Vorgehen, eine Übersicht potentiell anzubindender Prozesse und interne <text:tab/>Zielvorgaben für die Anbindung?</text:span><text:span text:style-name="T530"/><text:span text:style-name="T531"/></text:p>
      <text:p text:style-name="P124"><text:span text:style-name="T532"/><text:span text:style-name="T533"><text:tab/></text:span><text:span text:style-name="T534"/><text:span text:style-name="T535"/></text:p>
      <text:p text:style-name="P125"><text:span text:style-name="T536"/><text:span text:style-name="T537"/><text:span text:style-name="T538"/></text:p>
      <text:p text:style-name="P126"><text:span text:style-name="T539"/><text:span text:style-name="T540"/><text:span text:style-name="T541"/></text:p>
      <text:list text:style-name="WWNum11" text:continue-numbering="true">
        <text:list-item>
          <text:p text:style-name="P127"><text:span text:style-name="T542"/><text:span text:style-name="T543">Welche Maßnahmen werden getroffen, um eine automatisierte Veröffentlichung von Daten zu fördern/ermöglichen?</text:span><text:span text:style-name="T544"/><text:span text:style-name="T545"/></text:p>
        </text:list-item>
      </text:list>
      <text:p text:style-name="P128"><text:span text:style-name="T546"/><text:span text:style-name="T547"><text:tab/></text:span><text:span text:style-name="T548"/><text:span text:style-name="T549"/></text:p>
      <text:p text:style-name="P129"><text:span text:style-name="T550"/><text:span text:style-name="T551"/><text:span text:style-name="T552"/></text:p>
      <text:p text:style-name="P130"><text:span text:style-name="T553"/><text:span text:style-name="T554"/><text:span text:style-name="T555"/></text:p>
      <text:list text:style-name="WWNum12" text:continue-numbering="true">
        <text:list-item>
          <text:p text:style-name="P131"><text:span text:style-name="T556"/><text:span text:style-name="T557">Welche Verfahren werden getroffen, um Metadatenqualität und inhaltliche Qualität der Daten zu sichern?</text:span><text:span text:style-name="T558"/><text:span text:style-name="T559"/></text:p>
        </text:list-item>
      </text:list>
      <text:p text:style-name="P132"><text:span text:style-name="T560"/><text:span text:style-name="T561"><text:tab/></text:span><text:span text:style-name="T562"/><text:span text:style-name="T563"/></text:p>
      <text:p text:style-name="P133"><text:span text:style-name="T564"/><text:span text:style-name="T565"/><text:span text:style-name="T566"/></text:p>
      <text:list text:style-name="WWNum13" text:continue-numbering="true">
        <text:list-item>
          <text:p text:style-name="P134"><text:span text:style-name="T567"/><text:span text:style-name="T568">Welche technischen Tools im Umgang zur Vor- und Nachbereitung von Open Data nutzen Sie an Ihrer Stelle?</text:span><text:span text:style-name="T569"><text:s/></text:span><text:span text:style-name="T570"><text:tab/></text:span><text:span text:style-name="T571"/><text:span text:style-name="T572"/></text:p>
        </text:list-item>
      </text:list>
      <text:p text:style-name="P135"><text:span text:style-name="T573"/><text:span text:style-name="T574">Z.B. im Vorfeld der Datenbereitstellung oder für Monitoring/Visualisierung der vorhandenen Daten.</text:span><text:span text:style-name="T575"/><text:span text:style-name="T576"/></text:p>
      <text:p text:style-name="P136"><text:span text:style-name="T577"/><text:span text:style-name="T578"><text:tab/></text:span><text:span text:style-name="T579"/><text:span text:style-name="T580"/></text:p>
      <text:p text:style-name="P137"><text:span text:style-name="T581"/><text:span text:style-name="T582"/><text:span text:style-name="T583"/></text:p>
      <text:p text:style-name="P138"><text:span text:style-name="T584"/><text:span text:style-name="T585"/><text:span text:style-name="T586"/></text:p>
      <text:p text:style-name="P139"><text:span text:style-name="T587"/><text:span text:style-name="T588">Open-Data-Ökosystem</text:span><text:span text:style-name="T589"/><text:span text:style-name="T590"/></text:p>
      <text:p text:style-name="P140"><text:span text:style-name="T591"/><text:span text:style-name="T592"/><text:span text:style-name="T593"/></text:p>
      <text:list text:style-name="WWNum21" text:continue-numbering="true">
        <text:list-item>
          <text:p text:style-name="P141"><text:span text:style-name="T594"/><text:span text:style-name="T595">Welche internen Austauschformate zum Thema Open Data und Datennutzung gibt es innerhalb Ihrer Verwaltung? </text:span><text:span text:style-name="T596"/><text:span text:style-name="T597"/></text:p>
        </text:list-item>
      </text:list>
      <text:p text:style-name="P142"><text:span text:style-name="T598"/><text:span text:style-name="T599">Welche Unterstützungsmöglichkeiten werden für Ressorts/nachgeordnete Behörden/Dienststellen angeboten?</text:span><text:span text:style-name="T600"/><text:span text:style-name="T601"/></text:p>
      <text:p text:style-name="P143"><text:span text:style-name="T602"/><text:span text:style-name="T603"><text:tab/></text:span><text:span text:style-name="T604"/><text:span text:style-name="T605"/></text:p>
      <text:p text:style-name="P144"><text:span text:style-name="T606"/><text:span text:style-name="T607"/><text:span text:style-name="T608"/></text:p>
      <text:p text:style-name="P145"><text:span text:style-name="T609"/><text:span text:style-name="T610"/><text:span text:style-name="T611"/></text:p>
      <text:list text:style-name="WWNum18" text:continue-numbering="true">
        <text:list-item>
          <text:p text:style-name="P146"><text:span text:style-name="T612"/><text:span text:style-name="T613">Werden auch Nutzendengruppen außerhalb der Verwaltung aktiv angesprochen?</text:span><text:span text:style-name="T614"/><text:span text:style-name="T615"/></text:p>
        </text:list-item>
      </text:list>
      <text:p text:style-name="P147"><text:span text:style-name="T616"/><text:span text:style-name="T617">Wenn ja, auf welchem Wege findet dies statt? Z.B. Open Data Day, Newsletter, Austauschformate</text:span><text:span text:style-name="T618">.</text:span><text:span text:style-name="T619"/><text:span text:style-name="T620"/></text:p>
      <text:p text:style-name="P148"><text:span text:style-name="T621"/><text:span text:style-name="T622"><text:tab/></text:span><text:span text:style-name="T623"/><text:span text:style-name="T624"/></text:p>
      <text:p text:style-name="P149"><text:span text:style-name="T625"/><text:span text:style-name="T626"/><text:span text:style-name="T627"/></text:p>
      <text:p text:style-name="P150"><text:span text:style-name="T628"/><text:span text:style-name="T629"/><text:span text:style-name="T630"/></text:p>
      <text:p text:style-name="P151"><text:span text:style-name="T631"/><text:span text:style-name="T632">Ausblick</text:span><text:span text:style-name="T633"/><text:span text:style-name="T634"/></text:p>
      <text:p text:style-name="P152"><text:span text:style-name="T635"/><text:span text:style-name="T636"/><text:span text:style-name="T637"/></text:p>
      <text:list text:style-name="WWNum19" text:continue-numbering="true">
        <text:list-item>
          <text:p text:style-name="P153"><text:span text:style-name="T638"/><text:span text:style-name="T639">Welche Weiterentwicklungen im Bereich Open Data sind für dieses und das nächste Jahr geplant?<text:s text:c="2"/></text:span><text:span text:style-name="T640"/><text:span text:style-name="T641"/></text:p>
        </text:list-item>
      </text:list>
      <text:p text:style-name="P154"><text:span text:style-name="T642">Diese können zum Beispiel technisch, organisatorisch oder auch am Rechtsrahmen sein.</text:span><text:span text:style-name="T643"/><text:span text:style-name="T644"/></text:p>
      <text:p text:style-name="P155"><text:span text:style-name="T645"/><text:span text:style-name="T646"><text:tab/></text:span><text:span text:style-name="T647"/><text:span text:style-name="T648"/></text:p>
      <text:p text:style-name="P156"><text:span text:style-name="T649"/><text:span text:style-name="T650"/><text:span text:style-name="T651"/></text:p>
      <text:p text:style-name="P157"><text:span text:style-name="T652"/><text:span text:style-name="T653"/><text:span text:style-name="T654"/></text:p>
      <text:list text:style-name="WWNum22" text:continue-numbering="true">
        <text:list-item>
          <text:p text:style-name="P158"><text:span text:style-name="T655"/><text:span text:style-name="T656">Gibt es sonstiges Feedback zum Open Data Ranking oder Hinweise auf Fehler in der letzten Version?</text:span><text:span text:style-name="T657"/><text:span text:style-name="T658"/></text:p>
        </text:list-item>
      </text:list>
      <text:p text:style-name="P159"><text:span text:style-name="T659"><text:tab/></text:span><text:span text:style-name="T660">Den letzten Stand des Rankings 2025 können Sie </text:span><text:a xlink:href="https://opendataranking.de/" xlink:type="simple"><text:span text:style-name="T661">hier</text:span></text:a><text:span text:style-name="T662"> einsehen. Anmerkungen können gerne direkt <text:tab/>unter die Fragen geschrieben werden oder alternativ per Mail an </text:span><text:a xlink:href="mailto:opendata@okfn.de" xlink:type="simple"><text:span text:style-name="T663">opendata@okfn.de</text:span></text:a><text:span text:style-name="T664"> geschickt<text:tab/>werden.</text:span><text:span text:style-name="T665"/><text:span text:style-name="T666"/></text:p>
      <text:p text:style-name="P160"><text:span text:style-name="T667"/><text:span text:style-name="T668"><text:tab/></text:span><text:span text:style-name="T669"/><text:span text:style-name="T670"/></text:p>
      <text:p text:style-name="P161"><text:span text:style-name="T671"/><text:span text:style-name="T672"/><text:span text:style-name="T673"/></text:p>
      <text:p text:style-name="P162"><text:span text:style-name="T674"/><text:span text:style-name="T675"/><text:span text:style-name="T676"/></text:p>
      <text:p text:style-name="P163"><text:span text:style-name="T677"/><text:span text:style-name="T678"/><text:span text:style-name="T679"/></text:p>
      <text:p text:style-name="P164"><text:span text:style-name="T680"/><text:span text:style-name="T681"/><text:span text:style-name="T682"/></text:p>
      <text:p text:style-name="P165"><text:span text:style-name="T683"/><text:span text:style-name="T684"/><text:span text:style-name="T685"/></text:p>
      <text:p text:style-name="P166"><text:span text:style-name="T686"/><text:span text:style-name="T687"/><text:span text:style-name="T688"/></text:p>
      <text:p text:style-name="P167"><text:span text:style-name="T689"/><text:span text:style-name="T690"/><text:span text:style-name="T691"/></text:p>
      <text:p text:style-name="P168"><text:span text:style-name="T692"/><text:span text:style-name="T693"/><text:span text:style-name="T694"/></text:p>
      <text:p text:style-name="P169"><text:span text:style-name="T695"/><text:span text:style-name="T696"/><text:span text:style-name="T697"/></text:p>
      <text:p text:style-name="P170"><text:span text:style-name="T698"/><text:span text:style-name="T699"/><text:span text:style-name="T70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line-height="100%"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990" style:display-name="Placeholder Text" style:family="text" style:name="843">
      <style:paragraph-properties/>
      <style:text-properties fo:color="#666666"/>
    </style:style>
    <style:style style:parent-style-name="980" style:display-name="toc 1" style:family="paragraph" style:name="844">
      <style:paragraph-properties fo:margin-bottom="5pt"/>
    </style:style>
    <style:style style:parent-style-name="980" style:display-name="toc 2" style:family="paragraph" style:name="845">
      <style:paragraph-properties fo:margin-left="0.3881cm" fo:margin-bottom="5pt"/>
    </style:style>
    <style:style style:parent-style-name="980" style:display-name="toc 3" style:family="paragraph" style:name="846">
      <style:paragraph-properties fo:margin-left="0.7762cm" fo:margin-bottom="5pt"/>
    </style:style>
    <style:style style:parent-style-name="980" style:display-name="toc 4" style:family="paragraph" style:name="847">
      <style:paragraph-properties fo:margin-left="1.164cm" fo:margin-bottom="5pt"/>
    </style:style>
    <style:style style:parent-style-name="980" style:display-name="toc 5" style:family="paragraph" style:name="848">
      <style:paragraph-properties fo:margin-left="1.552cm" fo:margin-bottom="5pt"/>
    </style:style>
    <style:style style:parent-style-name="980" style:display-name="toc 6" style:family="paragraph" style:name="849">
      <style:paragraph-properties fo:margin-left="1.94cm" fo:margin-bottom="5pt"/>
    </style:style>
    <style:style style:parent-style-name="980" style:display-name="toc 7" style:family="paragraph" style:name="850">
      <style:paragraph-properties fo:margin-left="2.328cm" fo:margin-bottom="5pt"/>
    </style:style>
    <style:style style:parent-style-name="980" style:display-name="toc 8" style:family="paragraph" style:name="851">
      <style:paragraph-properties fo:margin-left="2.717cm" fo:margin-bottom="5pt"/>
    </style:style>
    <style:style style:parent-style-name="980" style:display-name="toc 9" style:family="paragraph" style:name="852">
      <style:paragraph-properties fo:margin-left="3.105cm" fo:margin-bottom="5pt"/>
    </style:style>
    <style:style style:class="default" style:display-name="Normal" style:family="paragraph" style:name="980">
      <style:paragraph-properties fo:line-height="115%"/>
      <style:text-properties fo:font-family="HK Grotesk" style:font-family-asian="HK Grotesk" style:font-family-complex="HK Grotesk" fo:font-size="10pt" fo:language="de" fo:country="DE"/>
    </style:style>
    <style:style style:parent-style-name="980" style:display-name="Heading 1" style:family="paragraph" style:name="981">
      <style:paragraph-properties/>
      <style:text-properties fo:color="#4338ca" fo:font-family="HK Grotesk" style:font-family-asian="HK Grotesk" style:font-family-complex="HK Grotesk" fo:font-size="14pt" style:font-size-complex="14pt" fo:language="de" fo:country="DE" fo:font-weight="bold"/>
    </style:style>
    <style:style style:parent-style-name="980" style:display-name="Heading 2" style:family="paragraph" style:name="982">
      <style:paragraph-properties/>
      <style:text-properties fo:color="#4338ca" fo:font-family="HK Grotesk" style:font-family-asian="HK Grotesk" style:font-family-complex="HK Grotesk" fo:font-size="14pt" style:font-size-complex="14pt" fo:language="de" fo:country="DE"/>
    </style:style>
    <style:style style:parent-style-name="982" style:display-name="Heading 3" style:family="paragraph" style:name="983">
      <style:paragraph-properties/>
      <style:text-properties fo:color="#000000" fo:font-family="HK Grotesk" style:font-family-asian="HK Grotesk" style:font-family-complex="HK Grotesk" fo:language="de" fo:country="DE"/>
    </style:style>
    <style:style style:parent-style-name="982" style:display-name="Heading 4" style:family="paragraph" style:name="984">
      <style:paragraph-properties/>
      <style:text-properties fo:color="#4338ca" fo:font-family="HK Grotesk" style:font-family-asian="HK Grotesk" style:font-family-complex="HK Grotesk" fo:font-size="12pt" style:font-size-complex="12pt" fo:language="de" fo:country="DE"/>
    </style:style>
    <style:style style:parent-style-name="982" style:display-name="Heading 5" style:family="paragraph" style:name="985">
      <style:paragraph-properties/>
      <style:text-properties fo:color="#000000" fo:font-family="HK Grotesk" style:font-family-asian="HK Grotesk" style:font-family-complex="HK Grotesk" fo:font-size="12pt" style:font-size-complex="12pt" fo:language="de" fo:country="DE"/>
    </style:style>
    <style:style style:parent-style-name="982" style:display-name="Heading 6" style:family="paragraph" style:name="986">
      <style:paragraph-properties/>
      <style:text-properties fo:color="#000000" fo:font-family="HK Grotesk" style:font-family-asian="HK Grotesk" style:font-family-complex="HK Grotesk" fo:font-size="11pt" style:font-size-complex="11pt" fo:language="de" fo:country="DE" fo:font-weight="bold"/>
    </style:style>
    <style:style style:parent-style-name="982" style:display-name="Heading 7" style:family="paragraph" style:name="987">
      <style:paragraph-properties/>
      <style:text-properties fo:color="#000000" fo:font-family="HK Grotesk" style:font-family-asian="HK Grotesk" style:font-family-complex="HK Grotesk" fo:font-size="11pt" style:font-size-complex="11pt" fo:language="de" fo:country="DE" fo:font-weight="normal"/>
    </style:style>
    <style:style style:parent-style-name="982" style:display-name="Heading 8" style:family="paragraph" style:name="988">
      <style:paragraph-properties/>
      <style:text-properties fo:color="#4338ca" fo:font-family="HK Grotesk" style:font-family-asian="HK Grotesk" style:font-family-complex="HK Grotesk" fo:font-size="10pt" style:font-size-complex="10pt" fo:language="de" fo:country="DE" fo:font-weight="bold"/>
    </style:style>
    <style:style style:parent-style-name="982" style:display-name="Heading 9" style:family="paragraph" style:name="989">
      <style:paragraph-properties/>
      <style:text-properties fo:color="#000000" fo:font-family="HK Grotesk" style:font-family-asian="HK Grotesk" style:font-family-complex="HK Grotesk" fo:font-size="10pt" style:font-size-complex="10pt" fo:language="de" fo:country="DE" fo:font-weight="bold"/>
    </style:style>
    <style:style style:class="default" style:display-name="Default Paragraph Font" style:family="text" style:name="990">
      <style:paragraph-properties fo:line-height="100%"/>
      <style:text-properties/>
    </style:style>
    <style:style style:display-name="Heading 1 Char" style:family="text" style:name="992">
      <style:paragraph-properties/>
      <style:text-properties fo:font-size="14pt" style:font-size-complex="14pt"/>
    </style:style>
    <style:style style:parent-style-name="990" style:display-name="Heading 2 Char" style:family="text" style:name="993">
      <style:paragraph-properties/>
      <style:text-properties fo:color="#4338ca" fo:font-family="HK Grotesk" style:font-family-asian="HK Grotesk" style:font-family-complex="HK Grotesk" fo:font-size="14pt" style:font-size-complex="14pt" fo:language="de" fo:country="DE"/>
    </style:style>
    <style:style style:display-name="Heading 3 Char" style:family="text" style:name="994">
      <style:paragraph-properties/>
      <style:text-properties fo:color="#000000" fo:font-family="HK Grotesk" style:font-family-asian="HK Grotesk" style:font-family-complex="HK Grotesk" fo:language="de" fo:country="DE"/>
    </style:style>
    <style:style style:display-name="Heading 4 Char" style:family="text" style:name="995">
      <style:paragraph-properties/>
      <style:text-properties fo:color="#4338ca" fo:font-family="HK Grotesk" style:font-family-asian="HK Grotesk" style:font-family-complex="HK Grotesk" fo:font-size="12pt" style:font-size-complex="12pt" fo:language="de" fo:country="DE"/>
    </style:style>
    <style:style style:display-name="Heading 5 Char" style:family="text" style:name="996">
      <style:paragraph-properties/>
      <style:text-properties fo:color="#000000" fo:font-family="HK Grotesk" style:font-family-asian="HK Grotesk" style:font-family-complex="HK Grotesk" fo:font-size="12pt" style:font-size-complex="12pt" fo:language="de" fo:country="DE"/>
    </style:style>
    <style:style style:display-name="Heading 6 Char" style:family="text" style:name="997">
      <style:paragraph-properties/>
      <style:text-properties fo:color="#000000" fo:font-family="HK Grotesk" style:font-family-asian="HK Grotesk" style:font-family-complex="HK Grotesk" fo:font-size="11pt" style:font-size-complex="11pt" fo:language="de" fo:country="DE" fo:font-weight="bold"/>
    </style:style>
    <style:style style:display-name="Heading 7 Char" style:family="text" style:name="998">
      <style:paragraph-properties/>
      <style:text-properties fo:color="#000000" fo:font-family="HK Grotesk" style:font-family-asian="HK Grotesk" style:font-family-complex="HK Grotesk" fo:font-size="11pt" style:font-size-complex="11pt" fo:language="de" fo:country="DE" fo:font-weight="normal"/>
    </style:style>
    <style:style style:display-name="Heading 8 Char" style:family="text" style:name="999">
      <style:paragraph-properties/>
      <style:text-properties fo:color="#4338ca" fo:font-family="HK Grotesk" style:font-family-asian="HK Grotesk" style:font-family-complex="HK Grotesk" fo:font-size="10pt" style:font-size-complex="10pt" fo:language="de" fo:country="DE" fo:font-weight="bold"/>
    </style:style>
    <style:style style:display-name="Heading 9 Char" style:family="text" style:name="1000">
      <style:paragraph-properties/>
      <style:text-properties fo:color="#000000" fo:font-family="HK Grotesk" style:font-family-asian="HK Grotesk" style:font-family-complex="HK Grotesk" fo:font-size="10pt" style:font-size-complex="10pt" fo:language="de" fo:country="DE" fo:font-weight="bold"/>
    </style:style>
    <style:style style:parent-style-name="980" style:display-name="Title" style:family="paragraph" style:name="1001">
      <style:paragraph-properties fo:text-align="center"/>
      <style:text-properties fo:color="#4338ca" fo:font-family="HK Grotesk" style:font-family-asian="HK Grotesk" style:font-family-complex="HK Grotesk" fo:font-size="18pt" style:font-size-complex="18pt" fo:font-weight="bold"/>
    </style:style>
    <style:style style:display-name="Title Char" style:family="text" style:name="1002">
      <style:paragraph-properties/>
    </style:style>
    <style:style style:parent-style-name="980" style:display-name="Subtitle" style:family="paragraph" style:name="1003">
      <style:paragraph-properties/>
      <style:text-properties fo:color="#000000" fo:font-family="HK Grotesk" style:font-family-asian="HK Grotesk" style:font-family-complex="HK Grotesk"/>
    </style:style>
    <style:style style:display-name="Subtitle Char" style:family="text" style:name="1004">
      <style:paragraph-properties/>
      <style:text-properties fo:color="#000000" fo:font-family="HK Grotesk" style:font-family-asian="HK Grotesk" style:font-family-complex="HK Grotesk"/>
    </style:style>
    <style:style style:parent-style-name="980" style:display-name="Quote" style:family="paragraph" style:name="1005">
      <style:paragraph-properties/>
      <style:text-properties fo:font-family="HK Grotesk" style:font-family-asian="HK Grotesk" style:font-family-complex="HK Grotesk" fo:font-style="italic"/>
    </style:style>
    <style:style style:display-name="Quote Char" style:family="text" style:name="1006">
      <style:paragraph-properties/>
      <style:text-properties fo:font-family="HK Grotesk" style:font-family-asian="HK Grotesk" style:font-family-complex="HK Grotesk" fo:font-style="italic"/>
    </style:style>
    <style:style style:parent-style-name="980" style:display-name="List Paragraph" style:family="paragraph" style:name="1007">
      <style:paragraph-properties/>
      <style:text-properties fo:font-family="HK Grotesk" style:font-family-asian="HK Grotesk" style:font-family-complex="HK Grotesk"/>
    </style:style>
    <style:style style:parent-style-name="980" style:display-name="Intense Emphasis" style:family="paragraph" style:name="1008">
      <style:paragraph-properties/>
      <style:text-properties fo:color="#4338ca" fo:font-family="HK Grotesk" style:font-family-asian="HK Grotesk" style:font-family-complex="HK Grotesk" fo:font-size="10pt" style:font-size-complex="10pt" fo:font-style="italic" style:text-underline-type="none" style:text-underline-width="auto" fo:font-weight="bold"/>
    </style:style>
    <style:style style:parent-style-name="980" style:display-name="Intense Quote" style:family="paragraph" style:name="1009">
      <style:paragraph-properties/>
      <style:text-properties fo:font-family="HK Grotesk" style:font-family-asian="HK Grotesk" style:font-family-complex="HK Grotesk" fo:font-style="italic" style:text-underline-type="single" style:text-underline-style="solid" style:text-underline-width="auto" style:text-underline-color="font-color"/>
    </style:style>
    <style:style style:display-name="Intense Quote Char" style:family="text" style:name="1010">
      <style:paragraph-properties/>
      <style:text-properties fo:font-family="HK Grotesk" style:font-family-asian="HK Grotesk" style:font-family-complex="HK Grotesk" fo:font-style="italic" style:text-underline-type="single" style:text-underline-style="solid" style:text-underline-width="auto" style:text-underline-color="font-color"/>
    </style:style>
    <style:style style:parent-style-name="980" style:display-name="Intense Reference" style:family="paragraph" style:name="1011">
      <style:paragraph-properties/>
      <style:text-properties fo:color="#4338ca" fo:font-family="HK Grotesk" style:font-family-asian="HK Grotesk" style:font-family-complex="HK Grotesk" fo:font-style="italic" style:text-underline-type="single" style:text-underline-style="solid" style:text-underline-width="auto" style:text-underline-color="font-color" fo:font-weight="normal"/>
    </style:style>
    <style:style style:parent-style-name="980" style:display-name="No Spacing" style:family="paragraph" style:name="1012">
      <style:paragraph-properties fo:line-height="100%" fo:margin-bottom="0pt"/>
    </style:style>
    <style:style style:parent-style-name="980" style:display-name="Subtle Emphasis" style:family="paragraph" style:name="1013">
      <style:paragraph-properties/>
      <style:text-properties fo:font-family="HK Grotesk" style:font-family-asian="HK Grotesk" style:font-family-complex="HK Grotesk" fo:font-style="italic"/>
    </style:style>
    <style:style style:parent-style-name="980" style:display-name="Emphasis" style:family="paragraph" style:name="1014">
      <style:paragraph-properties/>
      <style:text-properties fo:font-family="HK Grotesk" style:font-family-asian="HK Grotesk" style:font-family-complex="HK Grotesk" fo:font-style="italic" fo:font-weight="bold"/>
    </style:style>
    <style:style style:parent-style-name="980" style:display-name="Strong" style:family="paragraph" style:name="1015">
      <style:paragraph-properties/>
      <style:text-properties fo:font-family="HK Grotesk" style:font-family-asian="HK Grotesk" style:font-family-complex="HK Grotesk" fo:font-weight="bold"/>
    </style:style>
    <style:style style:parent-style-name="980" style:display-name="Subtle Reference" style:family="paragraph" style:name="1016">
      <style:paragraph-properties/>
      <style:text-properties fo:color="#4338ca" fo:font-family="HK Grotesk" style:font-family-asian="HK Grotesk" style:font-family-complex="HK Grotesk" fo:font-style="italic"/>
    </style:style>
    <style:style style:parent-style-name="980" style:display-name="Book Title" style:family="paragraph" style:name="1017">
      <style:paragraph-properties/>
      <style:text-properties fo:font-family="HK Grotesk" style:font-family-asian="HK Grotesk" style:font-family-complex="HK Grotesk" fo:font-size="10pt" style:font-size-complex="10pt" fo:font-weight="bold"/>
    </style:style>
    <style:style style:parent-style-name="980" style:display-name="Header" style:family="paragraph" style:name="1018">
      <style:paragraph-properties/>
      <style:text-properties fo:font-family="HK Grotesk" style:font-family-asian="HK Grotesk" style:font-family-complex="HK Grotesk"/>
    </style:style>
    <style:style style:display-name="Header Char" style:family="text" style:name="1019">
      <style:paragraph-properties/>
      <style:text-properties fo:font-family="HK Grotesk" style:font-family-asian="HK Grotesk" style:font-family-complex="HK Grotesk"/>
    </style:style>
    <style:style style:parent-style-name="980" style:display-name="Footer" style:family="paragraph" style:name="1020">
      <style:paragraph-properties/>
      <style:text-properties fo:font-family="HK Grotesk" style:font-family-asian="HK Grotesk" style:font-family-complex="HK Grotesk"/>
    </style:style>
    <style:style style:display-name="Footer Char" style:family="text" style:name="1021">
      <style:paragraph-properties/>
      <style:text-properties fo:font-family="HK Grotesk" style:font-family-asian="HK Grotesk" style:font-family-complex="HK Grotesk"/>
    </style:style>
    <style:style style:parent-style-name="980" style:display-name="Caption" style:family="paragraph" style:name="1022">
      <style:paragraph-properties/>
      <style:text-properties fo:color="#4338ca" fo:font-family="HK Grotesk" style:font-family-asian="HK Grotesk" style:font-family-complex="HK Grotesk"/>
    </style:style>
    <style:style style:parent-style-name="980" style:display-name="footnote text" style:family="paragraph" style:name="1023">
      <style:paragraph-properties/>
      <style:text-properties fo:font-family="HK Grotesk" style:font-family-asian="HK Grotesk" style:font-family-complex="HK Grotesk" fo:font-size="9pt" style:font-size-complex="9pt"/>
    </style:style>
    <style:style style:display-name="Footnote Text Char" style:family="text" style:name="1024">
      <style:paragraph-properties/>
      <style:text-properties fo:font-family="HK Grotesk" style:font-family-asian="HK Grotesk" style:font-family-complex="HK Grotesk" fo:font-size="9pt" style:font-size-complex="9pt"/>
    </style:style>
    <style:style style:parent-style-name="990" style:display-name="footnote reference" style:family="text" style:name="1025">
      <style:paragraph-properties/>
      <style:text-properties style:text-position="super 58%"/>
    </style:style>
    <style:style style:parent-style-name="980" style:display-name="endnote text" style:family="paragraph" style:name="1026">
      <style:paragraph-properties/>
      <style:text-properties fo:font-family="HK Grotesk" style:font-family-asian="HK Grotesk" style:font-family-complex="HK Grotesk" fo:font-size="9pt" style:font-size-complex="9pt"/>
    </style:style>
    <style:style style:display-name="Endnote Text Char" style:family="text" style:name="1027">
      <style:paragraph-properties/>
      <style:text-properties fo:font-family="HK Grotesk" style:font-family-asian="HK Grotesk" style:font-family-complex="HK Grotesk" fo:font-size="9pt" style:font-size-complex="9pt"/>
    </style:style>
    <style:style style:parent-style-name="990" style:display-name="endnote reference" style:family="text" style:name="1028">
      <style:paragraph-properties/>
      <style:text-properties style:text-position="super 58%"/>
    </style:style>
    <style:style style:parent-style-name="990" style:display-name="Hyperlink" style:family="text" style:name="1029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990" style:display-name="FollowedHyperlink" style:family="text" style:name="1030">
      <style:paragraph-properties/>
      <style:text-properties fo:color="#954f72" style:text-underline-type="single" style:text-underline-style="solid" style:text-underline-width="auto" style:text-underline-color="font-color"/>
    </style:style>
    <style:style style:display-name="TOC Heading" style:family="paragraph" style:name="1031">
      <style:paragraph-properties/>
    </style:style>
    <style:style style:parent-style-name="980" style:display-name="table of figures" style:family="paragraph" style:name="1032">
      <style:paragraph-properties fo:margin-bottom="0pt"/>
    </style:style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/>
    </style:style>
    <style:style style:family="text" style:name="T110">
      <style:text-properties/>
    </style:style>
    <style:style style:family="text" style:name="T111">
      <style:text-properties/>
    </style:style>
    <style:style style:family="text" style:name="T112">
      <style:text-properties/>
    </style:style>
    <style:style style:family="text" style:name="T113">
      <style:text-properties/>
    </style:style>
    <style:style style:family="text" style:name="T114">
      <style:text-properties/>
    </style:style>
    <style:style style:family="text" style:name="T115">
      <style:text-properties/>
    </style:style>
    <style:style style:family="text" style:name="T116">
      <style:text-properties/>
    </style:style>
    <style:style style:family="text" style:name="T117">
      <style:text-properties/>
    </style:style>
    <style:style style:family="text" style:name="T118">
      <style:text-properties/>
    </style:style>
    <style:style style:family="text" style:name="T119">
      <style:text-properties/>
    </style:style>
    <style:style style:family="text" style:name="T120">
      <style:text-properties/>
    </style:style>
    <style:style style:family="text" style:name="T121">
      <style:text-properties/>
    </style:style>
    <style:style style:family="text" style:name="T122">
      <style:text-properties/>
    </style:style>
    <style:style style:family="text" style:name="T123">
      <style:text-properties/>
    </style:style>
    <style:style style:family="text" style:name="T124">
      <style:text-properties/>
    </style:style>
    <style:style style:family="text" style:name="T125">
      <style:text-properties/>
    </style:style>
    <style:style style:family="text" style:name="T126">
      <style:text-properties/>
    </style:style>
    <style:style style:family="text" style:name="T127">
      <style:text-properties/>
    </style:style>
    <style:style style:family="text" style:name="T128">
      <style:text-properties/>
    </style:style>
    <style:style style:family="text" style:name="T129">
      <style:text-properties/>
    </style:style>
    <style:style style:family="text" style:name="T130">
      <style:text-properties/>
    </style:style>
    <style:style style:family="text" style:name="T131">
      <style:text-properties/>
    </style:style>
    <style:style style:family="text" style:name="T132">
      <style:text-properties/>
    </style:style>
    <style:style style:family="text" style:name="T133">
      <style:text-properties/>
    </style:style>
    <style:style style:family="text" style:name="T134">
      <style:text-properties/>
    </style:style>
    <style:style style:family="text" style:name="T135">
      <style:text-properties/>
    </style:style>
    <style:style style:family="text" style:name="T136">
      <style:text-properties/>
    </style:style>
    <style:style style:family="text" style:name="T137">
      <style:text-properties/>
    </style:style>
    <style:style style:family="text" style:name="T138">
      <style:text-properties/>
    </style:style>
    <style:style style:family="text" style:name="T139">
      <style:text-properties/>
    </style:style>
    <style:style style:family="text" style:name="T140">
      <style:text-properties/>
    </style:style>
    <style:style style:family="text" style:name="T141">
      <style:text-properties/>
    </style:style>
    <style:style style:family="text" style:name="T142">
      <style:text-properties/>
    </style:style>
    <style:style style:family="text" style:name="T143">
      <style:text-properties/>
    </style:style>
    <style:style style:family="text" style:name="T144">
      <style:text-properties/>
    </style:style>
    <style:style style:family="text" style:name="T145">
      <style:text-properties/>
    </style:style>
    <style:style style:family="text" style:name="T146">
      <style:text-properties/>
    </style:style>
    <style:style style:family="text" style:name="T147">
      <style:text-properties/>
    </style:style>
    <style:style style:family="text" style:name="T148">
      <style:text-properties/>
    </style:style>
    <style:style style:family="text" style:name="T149">
      <style:text-properties/>
    </style:style>
    <style:style style:family="text" style:name="T150">
      <style:text-properties/>
    </style:style>
    <style:style style:family="text" style:name="T151">
      <style:text-properties/>
    </style:style>
    <style:style style:family="text" style:name="T152">
      <style:text-properties/>
    </style:style>
    <style:style style:family="text" style:name="T153">
      <style:text-properties/>
    </style:style>
    <style:style style:family="text" style:name="T154">
      <style:text-properties/>
    </style:style>
    <style:style style:family="text" style:name="T155">
      <style:text-properties fo:font-family="Courier New" style:font-family-asian="Courier New" style:font-family-complex="Courier New"/>
    </style:style>
    <style:style style:family="text" style:name="T156">
      <style:text-properties fo:font-family="Wingdings" style:font-family-asian="Wingdings" style:font-family-complex="Wingdings"/>
    </style:style>
    <style:style style:family="text" style:name="T157">
      <style:text-properties fo:font-family="Symbol" style:font-family-asian="Symbol" style:font-family-complex="Symbol"/>
    </style:style>
    <style:style style:family="text" style:name="T158">
      <style:text-properties fo:font-family="Courier New" style:font-family-asian="Courier New" style:font-family-complex="Courier New"/>
    </style:style>
    <style:style style:family="text" style:name="T159">
      <style:text-properties fo:font-family="Wingdings" style:font-family-asian="Wingdings" style:font-family-complex="Wingdings"/>
    </style:style>
    <style:style style:family="text" style:name="T160">
      <style:text-properties fo:font-family="Symbol" style:font-family-asian="Symbol" style:font-family-complex="Symbol"/>
    </style:style>
    <style:style style:family="text" style:name="T161">
      <style:text-properties fo:font-family="Courier New" style:font-family-asian="Courier New" style:font-family-complex="Courier New"/>
    </style:style>
    <style:style style:family="text" style:name="T162">
      <style:text-properties fo:font-family="Wingdings" style:font-family-asian="Wingdings" style:font-family-complex="Wingdings"/>
    </style:style>
    <style:style style:family="text" style:name="T163">
      <style:text-properties/>
    </style:style>
    <style:style style:family="text" style:name="T164">
      <style:text-properties fo:font-family="Courier New" style:font-family-asian="Courier New" style:font-family-complex="Courier New"/>
    </style:style>
    <style:style style:family="text" style:name="T165">
      <style:text-properties fo:font-family="Wingdings" style:font-family-asian="Wingdings" style:font-family-complex="Wingdings"/>
    </style:style>
    <style:style style:family="text" style:name="T166">
      <style:text-properties fo:font-family="Symbol" style:font-family-asian="Symbol" style:font-family-complex="Symbol"/>
    </style:style>
    <style:style style:family="text" style:name="T167">
      <style:text-properties fo:font-family="Courier New" style:font-family-asian="Courier New" style:font-family-complex="Courier New"/>
    </style:style>
    <style:style style:family="text" style:name="T168">
      <style:text-properties fo:font-family="Wingdings" style:font-family-asian="Wingdings" style:font-family-complex="Wingdings"/>
    </style:style>
    <style:style style:family="text" style:name="T169">
      <style:text-properties fo:font-family="Symbol" style:font-family-asian="Symbol" style:font-family-complex="Symbol"/>
    </style:style>
    <style:style style:family="text" style:name="T170">
      <style:text-properties fo:font-family="Courier New" style:font-family-asian="Courier New" style:font-family-complex="Courier New"/>
    </style:style>
    <style:style style:family="text" style:name="T171">
      <style:text-properties fo:font-family="Wingdings" style:font-family-asian="Wingdings" style:font-family-complex="Wingdings"/>
    </style:style>
    <style:style style:family="text" style:name="T172">
      <style:text-properties/>
    </style:style>
    <style:style style:family="text" style:name="T173">
      <style:text-properties fo:font-family="Courier New" style:font-family-asian="Courier New" style:font-family-complex="Courier New"/>
    </style:style>
    <style:style style:family="text" style:name="T174">
      <style:text-properties fo:font-family="Wingdings" style:font-family-asian="Wingdings" style:font-family-complex="Wingdings"/>
    </style:style>
    <style:style style:family="text" style:name="T175">
      <style:text-properties fo:font-family="Symbol" style:font-family-asian="Symbol" style:font-family-complex="Symbol"/>
    </style:style>
    <style:style style:family="text" style:name="T176">
      <style:text-properties fo:font-family="Courier New" style:font-family-asian="Courier New" style:font-family-complex="Courier New"/>
    </style:style>
    <style:style style:family="text" style:name="T177">
      <style:text-properties fo:font-family="Wingdings" style:font-family-asian="Wingdings" style:font-family-complex="Wingdings"/>
    </style:style>
    <style:style style:family="text" style:name="T178">
      <style:text-properties fo:font-family="Symbol" style:font-family-asian="Symbol" style:font-family-complex="Symbol"/>
    </style:style>
    <style:style style:family="text" style:name="T179">
      <style:text-properties fo:font-family="Courier New" style:font-family-asian="Courier New" style:font-family-complex="Courier New"/>
    </style:style>
    <style:style style:family="text" style:name="T180">
      <style:text-properties fo:font-family="Wingdings" style:font-family-asian="Wingdings" style:font-family-complex="Wingdings"/>
    </style:style>
    <style:style style:family="text" style:name="T181">
      <style:text-properties/>
    </style:style>
    <style:style style:family="text" style:name="T182">
      <style:text-properties fo:font-family="Courier New" style:font-family-asian="Courier New" style:font-family-complex="Courier New"/>
    </style:style>
    <style:style style:family="text" style:name="T183">
      <style:text-properties fo:font-family="Wingdings" style:font-family-asian="Wingdings" style:font-family-complex="Wingdings"/>
    </style:style>
    <style:style style:family="text" style:name="T184">
      <style:text-properties fo:font-family="Symbol" style:font-family-asian="Symbol" style:font-family-complex="Symbol"/>
    </style:style>
    <style:style style:family="text" style:name="T185">
      <style:text-properties fo:font-family="Courier New" style:font-family-asian="Courier New" style:font-family-complex="Courier New"/>
    </style:style>
    <style:style style:family="text" style:name="T186">
      <style:text-properties fo:font-family="Wingdings" style:font-family-asian="Wingdings" style:font-family-complex="Wingdings"/>
    </style:style>
    <style:style style:family="text" style:name="T187">
      <style:text-properties fo:font-family="Symbol" style:font-family-asian="Symbol" style:font-family-complex="Symbol"/>
    </style:style>
    <style:style style:family="text" style:name="T188">
      <style:text-properties fo:font-family="Courier New" style:font-family-asian="Courier New" style:font-family-complex="Courier New"/>
    </style:style>
    <style:style style:family="text" style:name="T189">
      <style:text-properties fo:font-family="Wingdings" style:font-family-asian="Wingdings" style:font-family-complex="Wingdings"/>
    </style:style>
    <style:style style:family="text" style:name="T190">
      <style:text-properties/>
    </style:style>
    <style:style style:family="text" style:name="T191">
      <style:text-properties fo:font-family="Courier New" style:font-family-asian="Courier New" style:font-family-complex="Courier New"/>
    </style:style>
    <style:style style:family="text" style:name="T192">
      <style:text-properties fo:font-family="Wingdings" style:font-family-asian="Wingdings" style:font-family-complex="Wingdings"/>
    </style:style>
    <style:style style:family="text" style:name="T193">
      <style:text-properties fo:font-family="Symbol" style:font-family-asian="Symbol" style:font-family-complex="Symbol"/>
    </style:style>
    <style:style style:family="text" style:name="T194">
      <style:text-properties fo:font-family="Courier New" style:font-family-asian="Courier New" style:font-family-complex="Courier New"/>
    </style:style>
    <style:style style:family="text" style:name="T195">
      <style:text-properties fo:font-family="Wingdings" style:font-family-asian="Wingdings" style:font-family-complex="Wingdings"/>
    </style:style>
    <style:style style:family="text" style:name="T196">
      <style:text-properties fo:font-family="Symbol" style:font-family-asian="Symbol" style:font-family-complex="Symbol"/>
    </style:style>
    <style:style style:family="text" style:name="T197">
      <style:text-properties fo:font-family="Courier New" style:font-family-asian="Courier New" style:font-family-complex="Courier New"/>
    </style:style>
    <style:style style:family="text" style:name="T198">
      <style:text-properties fo:font-family="Wingdings" style:font-family-asian="Wingdings" style:font-family-complex="Wingdings"/>
    </style:style>
    <style:style style:family="text" style:name="T199">
      <style:text-properties/>
    </style:style>
    <style:style style:family="text" style:name="T200">
      <style:text-properties fo:font-family="Courier New" style:font-family-asian="Courier New" style:font-family-complex="Courier New"/>
    </style:style>
    <style:style style:family="text" style:name="T201">
      <style:text-properties fo:font-family="Wingdings" style:font-family-asian="Wingdings" style:font-family-complex="Wingdings"/>
    </style:style>
    <style:style style:family="text" style:name="T202">
      <style:text-properties fo:font-family="Symbol" style:font-family-asian="Symbol" style:font-family-complex="Symbol"/>
    </style:style>
    <style:style style:family="text" style:name="T203">
      <style:text-properties fo:font-family="Courier New" style:font-family-asian="Courier New" style:font-family-complex="Courier New"/>
    </style:style>
    <style:style style:family="text" style:name="T204">
      <style:text-properties fo:font-family="Wingdings" style:font-family-asian="Wingdings" style:font-family-complex="Wingdings"/>
    </style:style>
    <style:style style:family="text" style:name="T205">
      <style:text-properties fo:font-family="Symbol" style:font-family-asian="Symbol" style:font-family-complex="Symbol"/>
    </style:style>
    <style:style style:family="text" style:name="T206">
      <style:text-properties fo:font-family="Courier New" style:font-family-asian="Courier New" style:font-family-complex="Courier New"/>
    </style:style>
    <style:style style:family="text" style:name="T207">
      <style:text-properties fo:font-family="Wingdings" style:font-family-asian="Wingdings" style:font-family-complex="Wingdings"/>
    </style:style>
    <style:style style:family="text" style:name="T208">
      <style:text-properties fo:font-family="Symbol" style:font-family-asian="Symbol" style:font-family-complex="Symbol"/>
    </style:style>
    <style:style style:family="text" style:name="T209">
      <style:text-properties fo:font-family="Courier New" style:font-family-asian="Courier New" style:font-family-complex="Courier New"/>
    </style:style>
    <style:style style:family="text" style:name="T210">
      <style:text-properties fo:font-family="Wingdings" style:font-family-asian="Wingdings" style:font-family-complex="Wingdings"/>
    </style:style>
    <style:style style:family="text" style:name="T211">
      <style:text-properties fo:font-family="Symbol" style:font-family-asian="Symbol" style:font-family-complex="Symbol"/>
    </style:style>
    <style:style style:family="text" style:name="T212">
      <style:text-properties fo:font-family="Courier New" style:font-family-asian="Courier New" style:font-family-complex="Courier New"/>
    </style:style>
    <style:style style:family="text" style:name="T213">
      <style:text-properties fo:font-family="Wingdings" style:font-family-asian="Wingdings" style:font-family-complex="Wingdings"/>
    </style:style>
    <style:style style:family="text" style:name="T214">
      <style:text-properties fo:font-family="Symbol" style:font-family-asian="Symbol" style:font-family-complex="Symbol"/>
    </style:style>
    <style:style style:family="text" style:name="T215">
      <style:text-properties fo:font-family="Courier New" style:font-family-asian="Courier New" style:font-family-complex="Courier New"/>
    </style:style>
    <style:style style:family="text" style:name="T216">
      <style:text-properties fo:font-family="Wingdings" style:font-family-asian="Wingdings" style:font-family-complex="Wingdings"/>
    </style:style>
    <style:style style:family="text" style:name="T217">
      <style:text-properties fo:font-family="Symbol" style:font-family-asian="Symbol" style:font-family-complex="Symbol"/>
    </style:style>
    <style:style style:family="text" style:name="T218">
      <style:text-properties fo:font-family="Courier New" style:font-family-asian="Courier New" style:font-family-complex="Courier New"/>
    </style:style>
    <style:style style:family="text" style:name="T219">
      <style:text-properties fo:font-family="Wingdings" style:font-family-asian="Wingdings" style:font-family-complex="Wingdings"/>
    </style:style>
    <style:style style:family="text" style:name="T220">
      <style:text-properties fo:font-family="Symbol" style:font-family-asian="Symbol" style:font-family-complex="Symbol"/>
    </style:style>
    <style:style style:family="text" style:name="T221">
      <style:text-properties fo:font-family="Courier New" style:font-family-asian="Courier New" style:font-family-complex="Courier New"/>
    </style:style>
    <style:style style:family="text" style:name="T222">
      <style:text-properties fo:font-family="Wingdings" style:font-family-asian="Wingdings" style:font-family-complex="Wingdings"/>
    </style:style>
    <style:style style:family="text" style:name="T223">
      <style:text-properties fo:font-family="Symbol" style:font-family-asian="Symbol" style:font-family-complex="Symbol"/>
    </style:style>
    <style:style style:family="text" style:name="T224">
      <style:text-properties fo:font-family="Courier New" style:font-family-asian="Courier New" style:font-family-complex="Courier New"/>
    </style:style>
    <style:style style:family="text" style:name="T225">
      <style:text-properties fo:font-family="Wingdings" style:font-family-asian="Wingdings" style:font-family-complex="Wingdings"/>
    </style:style>
    <style:style style:family="text" style:name="T226">
      <style:text-properties fo:font-family="Symbol" style:font-family-asian="Symbol" style:font-family-complex="Symbol"/>
    </style:style>
    <style:style style:family="text" style:name="T227">
      <style:text-properties fo:font-family="Courier New" style:font-family-asian="Courier New" style:font-family-complex="Courier New"/>
    </style:style>
    <style:style style:family="text" style:name="T228">
      <style:text-properties fo:font-family="Wingdings" style:font-family-asian="Wingdings" style:font-family-complex="Wingdings"/>
    </style:style>
    <style:style style:family="text" style:name="T229">
      <style:text-properties fo:font-family="Symbol" style:font-family-asian="Symbol" style:font-family-complex="Symbol"/>
    </style:style>
    <style:style style:family="text" style:name="T230">
      <style:text-properties fo:font-family="Courier New" style:font-family-asian="Courier New" style:font-family-complex="Courier New"/>
    </style:style>
    <style:style style:family="text" style:name="T231">
      <style:text-properties fo:font-family="Wingdings" style:font-family-asian="Wingdings" style:font-family-complex="Wingdings"/>
    </style:style>
    <style:style style:family="text" style:name="T232">
      <style:text-properties fo:font-family="Symbol" style:font-family-asian="Symbol" style:font-family-complex="Symbol"/>
    </style:style>
    <style:style style:family="text" style:name="T233">
      <style:text-properties fo:font-family="Courier New" style:font-family-asian="Courier New" style:font-family-complex="Courier New"/>
    </style:style>
    <style:style style:family="text" style:name="T234">
      <style:text-properties fo:font-family="Wingdings" style:font-family-asian="Wingdings" style:font-family-complex="Wingdings"/>
    </style:style>
    <style:style style:family="text" style:name="T235">
      <style:text-properties fo:font-family="Symbol" style:font-family-asian="Symbol" style:font-family-complex="Symbol"/>
    </style:style>
    <style:style style:family="text" style:name="T236">
      <style:text-properties fo:font-family="Courier New" style:font-family-asian="Courier New" style:font-family-complex="Courier New"/>
    </style:style>
    <style:style style:family="text" style:name="T237">
      <style:text-properties fo:font-family="Wingdings" style:font-family-asian="Wingdings" style:font-family-complex="Wingdings"/>
    </style:style>
    <style:style style:family="text" style:name="T238">
      <style:text-properties fo:font-family="Symbol" style:font-family-asian="Symbol" style:font-family-complex="Symbol"/>
    </style:style>
    <style:style style:family="text" style:name="T239">
      <style:text-properties fo:font-family="Courier New" style:font-family-asian="Courier New" style:font-family-complex="Courier New"/>
    </style:style>
    <style:style style:family="text" style:name="T240">
      <style:text-properties fo:font-family="Wingdings" style:font-family-asian="Wingdings" style:font-family-complex="Wingdings"/>
    </style:style>
    <style:style style:family="text" style:name="T241">
      <style:text-properties fo:font-family="Symbol" style:font-family-asian="Symbol" style:font-family-complex="Symbol"/>
    </style:style>
    <style:style style:family="text" style:name="T242">
      <style:text-properties fo:font-family="Courier New" style:font-family-asian="Courier New" style:font-family-complex="Courier New"/>
    </style:style>
    <style:style style:family="text" style:name="T243">
      <style:text-properties fo:font-family="Wingdings" style:font-family-asian="Wingdings" style:font-family-complex="Wingdings"/>
    </style:style>
    <style:style style:family="text" style:name="T244">
      <style:text-properties/>
    </style:style>
    <style:style style:family="text" style:name="T245">
      <style:text-properties/>
    </style:style>
    <style:style style:family="text" style:name="T246">
      <style:text-properties/>
    </style:style>
    <style:style style:family="text" style:name="T247">
      <style:text-properties/>
    </style:style>
    <style:style style:family="text" style:name="T248">
      <style:text-properties/>
    </style:style>
    <style:style style:family="text" style:name="T249">
      <style:text-properties/>
    </style:style>
    <style:style style:family="text" style:name="T250">
      <style:text-properties/>
    </style:style>
    <style:style style:family="text" style:name="T251">
      <style:text-properties/>
    </style:style>
    <style:style style:family="text" style:name="T252">
      <style:text-properties/>
    </style:style>
    <style:style style:family="text" style:name="T253">
      <style:text-properties fo:font-family="Symbol" style:font-family-asian="Symbol" style:font-family-complex="Symbol"/>
    </style:style>
    <style:style style:family="text" style:name="T254">
      <style:text-properties fo:font-family="Courier New" style:font-family-asian="Courier New" style:font-family-complex="Courier New"/>
    </style:style>
    <style:style style:family="text" style:name="T255">
      <style:text-properties fo:font-family="Wingdings" style:font-family-asian="Wingdings" style:font-family-complex="Wingdings"/>
    </style:style>
    <style:style style:family="text" style:name="T256">
      <style:text-properties fo:font-family="Symbol" style:font-family-asian="Symbol" style:font-family-complex="Symbol"/>
    </style:style>
    <style:style style:family="text" style:name="T257">
      <style:text-properties fo:font-family="Courier New" style:font-family-asian="Courier New" style:font-family-complex="Courier New"/>
    </style:style>
    <style:style style:family="text" style:name="T258">
      <style:text-properties fo:font-family="Wingdings" style:font-family-asian="Wingdings" style:font-family-complex="Wingdings"/>
    </style:style>
    <style:style style:family="text" style:name="T259">
      <style:text-properties fo:font-family="Symbol" style:font-family-asian="Symbol" style:font-family-complex="Symbol"/>
    </style:style>
    <style:style style:family="text" style:name="T260">
      <style:text-properties fo:font-family="Courier New" style:font-family-asian="Courier New" style:font-family-complex="Courier New"/>
    </style:style>
    <style:style style:family="text" style:name="T261">
      <style:text-properties fo:font-family="Wingdings" style:font-family-asian="Wingdings" style:font-family-complex="Wingdings"/>
    </style:style>
    <style:style style:family="text" style:name="T262">
      <style:text-properties fo:font-family="Symbol" style:font-family-asian="Symbol" style:font-family-complex="Symbol"/>
    </style:style>
    <style:style style:family="text" style:name="T263">
      <style:text-properties fo:font-family="Courier New" style:font-family-asian="Courier New" style:font-family-complex="Courier New"/>
    </style:style>
    <style:style style:family="text" style:name="T264">
      <style:text-properties fo:font-family="Wingdings" style:font-family-asian="Wingdings" style:font-family-complex="Wingdings"/>
    </style:style>
    <style:style style:family="text" style:name="T265">
      <style:text-properties fo:font-family="Symbol" style:font-family-asian="Symbol" style:font-family-complex="Symbol"/>
    </style:style>
    <style:style style:family="text" style:name="T266">
      <style:text-properties fo:font-family="Courier New" style:font-family-asian="Courier New" style:font-family-complex="Courier New"/>
    </style:style>
    <style:style style:family="text" style:name="T267">
      <style:text-properties fo:font-family="Wingdings" style:font-family-asian="Wingdings" style:font-family-complex="Wingdings"/>
    </style:style>
    <style:style style:family="text" style:name="T268">
      <style:text-properties fo:font-family="Symbol" style:font-family-asian="Symbol" style:font-family-complex="Symbol"/>
    </style:style>
    <style:style style:family="text" style:name="T269">
      <style:text-properties fo:font-family="Courier New" style:font-family-asian="Courier New" style:font-family-complex="Courier New"/>
    </style:style>
    <style:style style:family="text" style:name="T270">
      <style:text-properties fo:font-family="Wingdings" style:font-family-asian="Wingdings" style:font-family-complex="Wingdings"/>
    </style:style>
    <style:style style:family="text" style:name="T271">
      <style:text-properties fo:font-family="Symbol" style:font-family-asian="Symbol" style:font-family-complex="Symbol"/>
    </style:style>
    <style:style style:family="text" style:name="T272">
      <style:text-properties fo:font-family="Courier New" style:font-family-asian="Courier New" style:font-family-complex="Courier New"/>
    </style:style>
    <style:style style:family="text" style:name="T273">
      <style:text-properties fo:font-family="Wingdings" style:font-family-asian="Wingdings" style:font-family-complex="Wingdings"/>
    </style:style>
    <style:style style:family="text" style:name="T274">
      <style:text-properties fo:font-family="Symbol" style:font-family-asian="Symbol" style:font-family-complex="Symbol"/>
    </style:style>
    <style:style style:family="text" style:name="T275">
      <style:text-properties fo:font-family="Courier New" style:font-family-asian="Courier New" style:font-family-complex="Courier New"/>
    </style:style>
    <style:style style:family="text" style:name="T276">
      <style:text-properties fo:font-family="Wingdings" style:font-family-asian="Wingdings" style:font-family-complex="Wingdings"/>
    </style:style>
    <style:style style:family="text" style:name="T277">
      <style:text-properties fo:font-family="Symbol" style:font-family-asian="Symbol" style:font-family-complex="Symbol"/>
    </style:style>
    <style:style style:family="text" style:name="T278">
      <style:text-properties fo:font-family="Courier New" style:font-family-asian="Courier New" style:font-family-complex="Courier New"/>
    </style:style>
    <style:style style:family="text" style:name="T279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">
      <text:list-level-style-number text:level="1" text:style-name="T19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0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21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2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23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24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25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26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27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9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30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31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32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33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34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35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36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5">
      <text:list-level-style-number text:level="1" text:style-name="T37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38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39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40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41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42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43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44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45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6">
      <text:list-level-style-number text:level="1" text:style-name="T46" style:num-format="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47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48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49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50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51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52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53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54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7">
      <text:list-level-style-number text:level="1" text:style-name="T55" style:num-format="">
        <style:list-level-properties text:list-level-position-and-space-mode="label-alignment">
          <style:list-level-label-alignment fo:text-indent="-0.635cm" fo:margin-left="2.5cm"/>
        </style:list-level-properties>
        <style:text-properties/>
      </text:list-level-style-number>
      <text:list-level-style-bullet text:level="2" text:style-name="T56" text:bullet-char="o">
        <style:list-level-properties text:list-level-position-and-space-mode="label-alignment">
          <style:list-level-label-alignment fo:text-indent="-0.635cm" fo:margin-left="3.77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5.04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6.3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7.58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8.85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number text:level="1" text:style-name="T64" style:num-format="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65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66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67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68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69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70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71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72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9">
      <text:list-level-style-number text:level="1" text:style-name="T73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74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75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76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77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78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79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80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81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0">
      <text:list-level-style-number text:level="1" text:style-name="T82" style:num-format="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83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84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85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86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87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88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89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90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1">
      <text:list-level-style-number text:level="1" text:style-name="T91" style:num-format="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92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93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9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95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96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9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98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99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2">
      <text:list-level-style-number text:level="1" text:style-name="T100" style:num-format="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">
      <text:list-level-style-number text:level="1" text:style-name="T109" style:num-format="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0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11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12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13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14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15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16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17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4">
      <text:list-level-style-number text:level="1" text:style-name="T118" style:num-format="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9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0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2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22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23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2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25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26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5">
      <text:list-level-style-number text:level="1" text:style-name="T127" style:num-format="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28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9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0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31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32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33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34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35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6">
      <text:list-level-style-bullet text:level="1" text:style-name="T136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2" text:style-name="T137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3" text:style-name="T138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4" text:style-name="T139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5" text:style-name="T140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6" text:style-name="T141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7" text:style-name="T142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8" text:style-name="T143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9" text:style-name="T144">
        <style:list-level-properties text:list-level-position-and-space-mode="label-alignment">
          <style:list-level-label-alignment/>
        </style:list-level-properties>
        <style:text-properties/>
      </text:list-level-style-bullet>
    </text:list-style>
    <text:list-style style:name="WWNum17">
      <text:list-level-style-bullet text:level="1" text:style-name="T145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2" text:style-name="T146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3" text:style-name="T147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4" text:style-name="T148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5" text:style-name="T149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6" text:style-name="T150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7" text:style-name="T151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8" text:style-name="T152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9" text:style-name="T153">
        <style:list-level-properties text:list-level-position-and-space-mode="label-alignment">
          <style:list-level-label-alignment/>
        </style:list-level-properties>
        <style:text-properties/>
      </text:list-level-style-bullet>
    </text:list-style>
    <text:list-style style:name="WWNum18">
      <text:list-level-style-number text:level="1" text:style-name="T154" style:num-format="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">
      <text:list-level-style-number text:level="1" text:style-name="T163" style:num-format="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">
      <text:list-level-style-number text:level="1" text:style-name="T172" style:num-format="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">
      <text:list-level-style-number text:level="1" text:style-name="T181" style:num-format="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">
      <text:list-level-style-number text:level="1" text:style-name="T190" style:num-format="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bullet text:level="2" text:style-name="T1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number text:level="1" text:style-name="T199" style:num-format="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">
      <text:list-level-style-bullet text:level="1" text:style-name="T20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bullet text:level="1" text:style-name="T22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244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2" text:style-name="T245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3" text:style-name="T246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4" text:style-name="T247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5" text:style-name="T248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6" text:style-name="T249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7" text:style-name="T250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8" text:style-name="T251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9" text:style-name="T252">
        <style:list-level-properties text:list-level-position-and-space-mode="label-alignment">
          <style:list-level-label-alignment/>
        </style:list-level-properties>
        <style:text-properties/>
      </text:list-level-style-bullet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">
      <text:list-level-style-bullet text:level="1" text:style-name="T26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.198cm" fo:margin-bottom="1.251cm" fo:margin-left="2cm" fo:margin-right="2cm"/>
      <style:header-style>
        <style:header-footer-properties svg:height="1.23cm" fo:min-height="1.23cm"/>
      </style:header-style>
      <style:footer-style>
        <style:header-footer-properties fo:min-height="1.251cm"/>
      </style:footer-style>
    </style:page-layout>
    <style:page-layout style:name="Mpm2">
      <style:page-layout-properties fo:page-width="21cm" fo:page-height="29.7cm" style:print-orientation="portrait" fo:margin-top="2.198cm" fo:margin-bottom="1.251cm" fo:margin-left="2cm" fo:margin-right="2cm"/>
      <style:header-style>
        <style:header-footer-properties svg:height="1.23cm" fo:min-height="1.23cm"/>
      </style:header-style>
      <style:footer-style>
        <style:header-footer-properties fo:min-height="1.251cm"/>
      </style:footer-style>
    </style:page-layout>
    <style:style style:family="paragraph" style:name="P40">
      <style:paragraph-properties/>
      <style:text-properties/>
    </style:style>
    <style:style style:family="paragraph" style:name="P41">
      <style:paragraph-properties fo:margin-left="0cm" fo:margin-right="0cm" fo:text-indent="0cm"/>
      <style:text-properties/>
    </style:style>
    <style:style style:family="text" style:name="T304">
      <style:text-properties/>
    </style:style>
    <style:style style:parent-style-name="Graphics" style:family="graphic" style:name="gr3">
      <style:graphic-properties style:repeat="stretch" style:wrap="run-through" fo:margin-left="0.32cm" fo:margin-right="0.32cm" fo:margin-top="0cm" fo:margin-bottom="0cm" style:horizontal-pos="from-left" style:horizontal-rel="char" style:vertical-pos="from-top" style:vertical-rel="paragraph" fo:background-color="transparent"/>
    </style:style>
    <style:style style:family="text" style:name="T305">
      <style:text-properties/>
    </style:style>
    <style:style style:family="paragraph" style:name="P42">
      <style:paragraph-properties/>
      <style:text-properties/>
    </style:style>
    <style:style style:family="text" style:name="T306">
      <style:text-properties/>
    </style:style>
    <style:style style:family="text" style:name="T307">
      <style:text-properties/>
    </style:style>
    <style:style style:family="text" style:name="T308">
      <style:text-properties/>
    </style:style>
    <style:style style:family="paragraph" style:name="P43">
      <style:paragraph-properties/>
      <style:text-properties/>
    </style:style>
    <style:style style:family="text" style:name="T309">
      <style:text-properties/>
    </style:style>
    <style:style style:family="text" style:name="T310">
      <style:text-properties/>
    </style:style>
    <style:style style:family="text" style:name="T311">
      <style:text-properties/>
    </style:style>
    <style:style style:parent-style-name="1018" style:family="paragraph" style:name="P44">
      <style:paragraph-properties/>
      <style:text-properties/>
    </style:style>
    <style:style style:parent-style-name="1018" style:family="paragraph" style:name="P45">
      <style:paragraph-properties/>
      <style:text-properties/>
    </style:style>
    <style:style style:parent-style-name="1020" style:family="paragraph" style:name="P46">
      <style:paragraph-properties fo:text-align="right"/>
      <style:text-properties/>
    </style:style>
    <style:style style:parent-style-name="1020" style:family="paragraph" style:name="P47">
      <style:paragraph-properties/>
      <style:text-properties/>
    </style:style>
    <style:style style:parent-style-name="1020" style:family="paragraph" style:name="P48">
      <style:paragraph-properties fo:text-align="right"/>
      <style:text-properties/>
    </style:style>
    <style:style style:family="paragraph" style:name="P50">
      <style:paragraph-properties/>
      <style:text-properties/>
    </style:style>
    <style:style style:family="paragraph" style:name="P51">
      <style:paragraph-properties fo:margin-left="0cm" fo:margin-right="0cm" fo:text-indent="0cm"/>
      <style:text-properties/>
    </style:style>
    <style:style style:family="text" style:name="T312">
      <style:text-properties/>
    </style:style>
    <style:style style:parent-style-name="Graphics" style:family="graphic" style:name="gr4">
      <style:graphic-properties style:repeat="stretch" style:wrap="run-through" fo:margin-left="0.32cm" fo:margin-right="0.32cm" fo:margin-top="0cm" fo:margin-bottom="0cm" style:horizontal-pos="from-left" style:horizontal-rel="char" style:vertical-pos="from-top" style:vertical-rel="paragraph" fo:background-color="transparent"/>
    </style:style>
    <style:style style:family="text" style:name="T313">
      <style:text-properties/>
    </style:style>
    <style:style style:family="paragraph" style:name="P52">
      <style:paragraph-properties/>
      <style:text-properties/>
    </style:style>
    <style:style style:family="text" style:name="T314">
      <style:text-properties/>
    </style:style>
    <style:style style:family="text" style:name="T315">
      <style:text-properties/>
    </style:style>
    <style:style style:family="text" style:name="T316">
      <style:text-properties/>
    </style:style>
    <style:style style:family="paragraph" style:name="P53">
      <style:paragraph-properties/>
      <style:text-properties/>
    </style:style>
    <style:style style:family="text" style:name="T317">
      <style:text-properties/>
    </style:style>
    <style:style style:family="text" style:name="T318">
      <style:text-properties/>
    </style:style>
    <style:style style:family="text" style:name="T319">
      <style:text-properties/>
    </style:style>
    <style:style style:parent-style-name="1018" style:family="paragraph" style:name="P54">
      <style:paragraph-properties/>
      <style:text-properties/>
    </style:style>
    <style:style style:parent-style-name="1018" style:family="paragraph" style:name="P55">
      <style:paragraph-properties/>
      <style:text-properties/>
    </style:style>
    <style:style style:parent-style-name="1020" style:family="paragraph" style:name="P56">
      <style:paragraph-properties fo:text-align="right"/>
      <style:text-properties/>
    </style:style>
    <style:style style:parent-style-name="1020" style:family="paragraph" style:name="P57">
      <style:paragraph-properties/>
      <style:text-properties/>
    </style:style>
    <style:style style:parent-style-name="1020" style:family="paragraph" style:name="P58">
      <style:paragraph-properties fo:text-align="right"/>
      <style:text-properties/>
    </style:style>
  </office:automatic-styles>
  <office:master-styles>
    <style:master-page style:name="Standard" style:page-layout-name="Mpm1">
      <style:footer>
        <text:p text:style-name="P46"><text:span><text:page-number text:select-page="current">3</text:page-number></text:span><text:span/><text:span>/</text:span><text:span><text:page-count>3</text:page-count></text:span><text:span/><text:span/></text:p>
        <text:p text:style-name="P47"><text:span/><text:span/></text:p>
      </style:footer>
      <style:header>
        <text:p text:style-name="P40"><text:span/><text:span/></text:p>
      </style:header>
      <style:header-first>
        <text:p text:style-name="P41"><text:span text:style-name="T304"/><text:span/><draw:frame draw:style-name="gr3" draw:z-index="2049" draw:transform="rotate(-0) translate(11.11cm,-0.2337cm)" text:anchor-type="paragraph" svg:width="6.371cm" svg:height="2.549cm"><draw:image xlink:href="Pictures/image1.png" xlink:type="simple" xlink:show="embed" xlink:actuate="onLoad"/></draw:frame><text:span text:style-name="T305"/><text:span/></text:p>
        <text:p text:style-name="P42"><text:span text:style-name="T306"/><text:span text:style-name="T307"/><text:span text:style-name="T308"/></text:p>
        <text:p text:style-name="P43"><text:span text:style-name="T309"/><text:span text:style-name="T310"/><text:span text:style-name="T311"/></text:p>
        <text:p text:style-name="P44"><text:span/><text:span/></text:p>
        <text:p text:style-name="P45"><text:span/><text:span/></text:p>
      </style:header-first>
      <style:footer-first>
        <text:p text:style-name="P48"><text:span><text:page-number text:select-page="current">1</text:page-number></text:span><text:span/><text:span>/</text:span><text:span><text:page-count>3</text:page-count></text:span><text:span/><text:span/></text:p>
      </style:footer-first>
    </style:master-page>
    <style:master-page style:name="MasterPage2" style:page-layout-name="Mpm2">
      <style:footer>
        <text:p text:style-name="P56"><text:span><text:page-number text:select-page="current">3</text:page-number></text:span><text:span/><text:span>/</text:span><text:span><text:page-count>3</text:page-count></text:span><text:span/><text:span/></text:p>
        <text:p text:style-name="P57"><text:span/><text:span/></text:p>
      </style:footer>
      <style:header>
        <text:p text:style-name="P50"><text:span/><text:span/></text:p>
      </style:header>
      <style:header-first>
        <text:p text:style-name="P51"><text:span text:style-name="T312"/><text:span/><draw:frame draw:style-name="gr4" draw:z-index="2049" draw:transform="rotate(-0) translate(11.11cm,-0.2337cm)" text:anchor-type="paragraph" svg:width="6.371cm" svg:height="2.549cm"><draw:image xlink:href="Pictures/image1.png" xlink:type="simple" xlink:show="embed" xlink:actuate="onLoad"/></draw:frame><text:span text:style-name="T313"/><text:span/></text:p>
        <text:p text:style-name="P52"><text:span text:style-name="T314"/><text:span text:style-name="T315"/><text:span text:style-name="T316"/></text:p>
        <text:p text:style-name="P53"><text:span text:style-name="T317"/><text:span text:style-name="T318"/><text:span text:style-name="T319"/></text:p>
        <text:p text:style-name="P54"><text:span/><text:span/></text:p>
        <text:p text:style-name="P55"><text:span/><text:span/></text:p>
      </style:header-first>
      <style:footer-first>
        <text:p text:style-name="P58"><text:span><text:page-number text:select-page="current">1</text:page-number></text:span><text:span/><text:span>/</text:span><text:span><text:page-count>3</text:page-count></text:span><text:span/><text:span/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4.1.15</meta:generator>
  </office:meta>
</office:document-meta>
</file>